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🧠 Ce que contient réellement ton <text:span text:style-name="Source_20_Text">tree</text:span></text:h>
      <text:p text:style-name="Text_20_body">Ton <text:span text:style-name="Source_20_Text">tree</text:span> est une <text:span text:style-name="Strong_20_Emphasis">structure intermédiaire de navigation</text:span>, pas une copie complète du disque.</text:p>
      <text:p text:style-name="Text_20_body">Il contient uniquement :</text:p>
      <text:p text:style-name="Horizontal_20_Line"/>
      <text:h text:style-name="Heading_20_2" text:outline-level="2">📦 1. Des <text:span text:style-name="Strong_20_Emphasis">folders (étagères / conteneurs)</text:span></text:h>
      <text:section text:style-name="Sect1" text:name="code-block-viewer">
        <text:p text:style-name="P1">{</text:p>
        <text:p text:style-name="Preformatted_20_Text"><text:s text:c="4"/>"_type": "folder",</text:p>
        <text:p text:style-name="Preformatted_20_Text"><text:s text:c="4"/>"_children": {...}</text:p>
        <text:p text:style-name="Preformatted_20_Text">}</text:p>
      </text:section>
      <text:p text:style-name="Text_20_body">👉 Ça représente :</text:p>
      <text:list text:style-name="L1">
        <text:list-item>
          <text:p text:style-name="P3">des dossiers qui ne contiennent <text:span text:style-name="Strong_20_Emphasis">pas de PDF</text:span> </text:p>
        </text:list-item>
        <text:list-item>
          <text:p text:style-name="P2">ou des niveaux intermédiaires de ta hiérarchie </text:p>
        </text:list-item>
      </text:list>
      <text:p text:style-name="Horizontal_20_Line"/>
      <text:h text:style-name="Heading_20_2" text:outline-level="2">🎼 2. Des <text:span text:style-name="Strong_20_Emphasis">files (partitions / livres)</text:span></text:h>
      <text:section text:style-name="Sect1" text:name="Section1">
        <text:p text:style-name="P1"><text:bookmark text:name="code-block-viewer"/>{</text:p>
        <text:p text:style-name="Preformatted_20_Text"><text:s text:c="4"/>"_type": "file",</text:p>
        <text:p text:style-name="Preformatted_20_Text"><text:s text:c="4"/>"titre": "...",</text:p>
        <text:p text:style-name="Preformatted_20_Text"><text:s text:c="4"/>"chemin": "..."</text:p>
        <text:p text:style-name="Preformatted_20_Text">}</text:p>
      </text:section>
      <text:p text:style-name="Text_20_body">👉 Ça représente :</text:p>
      <text:list text:style-name="L2">
        <text:list-item>
          <text:p text:style-name="P5">un dossier qui contient au moins un PDF </text:p>
        </text:list-item>
        <text:list-item>
          <text:p text:style-name="P5">son nom vient de <text:span text:style-name="Source_20_Text">trackname.txt</text:span> </text:p>
        </text:list-item>
        <text:list-item>
          <text:p text:style-name="P4">son emplacement est stocké via <text:span text:style-name="Source_20_Text">chemin</text:span> </text:p>
        </text:list-item>
      </text:list>
      <text:p text:style-name="Horizontal_20_Lin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5T16:07:38.347194430</meta:creation-date>
    <dc:date>2026-04-15T16:08:42.178767257</dc:date>
    <meta:editing-duration>PT1M5S</meta:editing-duration>
    <meta:editing-cycles>1</meta:editing-cycles>
    <meta:document-statistic meta:table-count="0" meta:image-count="0" meta:object-count="0" meta:page-count="1" meta:paragraph-count="21" meta:word-count="100" meta:character-count="570" meta:non-whitespace-character-count="471"/>
    <meta:generator>LibreOffice/24.2.7.2$Linux_X86_64 LibreOffice_project/420$Build-2</meta:generator>
  </office:meta>
</office:document-meta>
</file>