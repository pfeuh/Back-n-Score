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4">
      <style:text-properties fo:font-weight="bold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text-properties style:font-name="DejaVu Sans Mono" fo:font-size="10pt" style:font-size-asian="10pt" style:font-size-complex="10pt"/>
    </style:style>
    <style:style style:name="P5" style:family="paragraph" style:parent-style-name="Standard">
      <style:text-properties style:font-name="DejaVu Sans Mono" fo:font-size="10pt" officeooo:paragraph-rsid="00102a6c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0">
      <style:text-properties fo:font-weight="bold"/>
    </style:style>
    <style:style style:name="P17" style:family="paragraph" style:parent-style-name="Text_20_body">
      <style:text-properties officeooo:paragraph-rsid="00102a6c"/>
    </style:style>
    <style:style style:name="P18" style:family="paragraph" style:parent-style-name="Text_20_body">
      <style:paragraph-properties fo:break-before="page"/>
      <style:text-properties fo:font-size="10pt" officeooo:paragraph-rsid="00102a6c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DejaVu Sans Mono"/>
    </style:style>
    <style:style style:name="T3" style:family="text">
      <style:text-properties officeooo:rsid="00102a6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prenons donc point par point le travail de la <text:span text:style-name="T1">moulinette Python</text:span> avec cette structure optimisée.</text:p>
      <text:h text:style-name="Heading_20_3" text:outline-level="3">1. Génération du <text:span text:style-name="Source_20_Text">track_tree.json</text:span> (Format Plat)</text:h>
      <text:p text:style-name="Text_20_body">La moulinette scanne la base. Pour chaque dossier contenant un <text:span text:style-name="Source_20_Text">trackname.txt</text:span>, elle ajoute une entrée simple au dictionnaire.</text:p>
      <text:list text:style-name="L1">
        <text:list-item>
          <text:p text:style-name="P6"><text:span text:style-name="T1">Entrée :</text:span> Le système de fichiers.</text:p>
        </text:list-item>
        <text:list-item>
          <text:p text:style-name="P6"><text:span text:style-name="T1">Sortie :</text:span> Une liste d'objets <text:span text:style-name="Source_20_Text">{"title": "...", "location": "..."}</text:span>.</text:p>
        </text:list-item>
        <text:list-item>
          <text:p text:style-name="P6"><text:span text:style-name="T1">Logique :</text:span> Si <text:span text:style-name="Source_20_Text">location</text:span> est <text:span text:style-name="Source_20_Text">books/_realBook1/lazyBird</text:span>, le JS saura que "books" est l'étagère et "_realBook1" le livre.</text:p>
        </text:list-item>
      </text:list>
      <text:p text:style-name="Horizontal_20_Line"/>
      <text:h text:style-name="Heading_20_3" text:outline-level="3">2. Génération des Instrument Trees (<text:span text:style-name="Source_20_Text">popular</text:span> et <text:span text:style-name="Source_20_Text">classique</text:span>)</text:h>
      <text:p text:style-name="Text_20_body">C'est ici que la moulinette transforme ton dictionnaire technique <text:span text:style-name="Source_20_Text">INSTRUMENTS</text:span> en menus ergonomiques pour les musiciens.</text:p>
      <text:h text:style-name="P2" text:outline-level="4">A. Mode Popular (Par Métier)</text:h>
      <text:p text:style-name="Text_20_body">On ne suit pas l'alphabet, mais la fonction. La moulinette doit produire un JSON structuré ainsi :</text:p>
      <text:list text:style-name="L2">
        <text:list-item>
          <text:p text:style-name="P7"><text:span text:style-name="T1">MÉLODISTES</text:span> (Dossier)</text:p>
          <text:list>
            <text:list-item>
              <text:p text:style-name="P7"><text:span text:style-name="T1">DO</text:span> / <text:span text:style-name="T1">SIb</text:span> / <text:span text:style-name="T1">MIb</text:span> / <text:span text:style-name="T1">FA</text:span> (Sous-dossiers)</text:p>
              <text:list>
                <text:list-item>
                  <text:p text:style-name="P7">Instruments (Feuilles)</text:p>
                </text:list-item>
              </text:list>
            </text:list-item>
          </text:list>
        </text:list-item>
        <text:list-item>
          <text:p text:style-name="P7"><text:span text:style-name="T1">POMPISTES</text:span> (Dossier) -&gt; Instruments</text:p>
        </text:list-item>
        <text:list-item>
          <text:p text:style-name="P7"><text:span text:style-name="T1">BASSISTES</text:span> (Dossier) -&gt; Instruments</text:p>
        </text:list-item>
        <text:list-item>
          <text:p text:style-name="P7"><text:span text:style-name="T1">PERCUS</text:span> (Dossier) -&gt; Instruments</text:p>
        </text:list-item>
      </text:list>
      <text:h text:style-name="P2" text:outline-level="4">B. Mode Classique (Par Famille)</text:h>
      <text:p text:style-name="Text_20_body">La moulinette réorganise les mêmes instruments selon la nomenclature d'orchestre :</text:p>
      <text:list text:style-name="L3">
        <text:list-item>
          <text:p text:style-name="P8"><text:span text:style-name="T1">BOIS</text:span> (Dossier)</text:p>
        </text:list-item>
        <text:list-item>
          <text:p text:style-name="P8"><text:span text:style-name="T1">CUIVRES</text:span> (Dossier)</text:p>
        </text:list-item>
        <text:list-item>
          <text:p text:style-name="P8"><text:span text:style-name="T1">CORDES</text:span> (Dossier)</text:p>
        </text:list-item>
        <text:list-item>
          <text:p text:style-name="P8"><text:span text:style-name="T1">PERCUSSIONS</text:span> (Dossier)</text:p>
        </text:list-item>
      </text:list>
      <text:p text:style-name="Horizontal_20_Line"/>
      <text:h text:style-name="Heading_20_3" text:outline-level="3">3. La "Sanité" (Le verrou de sécurité)</text:h>
      <text:p text:style-name="Text_20_body">Avant de valider les JSON, la moulinette fait son job de douanier. Si elle trouve un fichier <text:span text:style-name="Source_20_Text">guitare_basse.pdf</text:span> dans un dossier de morceau et que <text:span text:style-name="Source_20_Text">guitare_basse</text:span> n'existe pas dans ton fichier <text:span text:style-name="Source_20_Text">instruments.py</text:span>, elle <text:span text:style-name="T1">bloque tout</text:span>.</text:p>
      <text:p text:style-name="Quotations"><text:soft-page-break/><text:span text:style-name="T1">Pourquoi c'est vital :</text:span> Cela t'oblige à garder une base de données propre. Si le générateur ne s'arrêtait pas, ton serveur essaierait de servir des fichiers que ton moteur de substitution ne saurait pas gérer.</text:p>
      <text:p text:style-name="Horizontal_20_Line"/>
      <text:h text:style-name="Heading_20_3" text:outline-level="3">4. Le Workflow de la Moulinette</text:h>
      <text:p text:style-name="Text_20_body">Voici l'algorithme que la moulinette doit exécuter :</text:p>
      <text:list text:style-name="L4">
        <text:list-item>
          <text:p text:style-name="P9"><text:span text:style-name="T1">Charger</text:span> <text:span text:style-name="Source_20_Text">INSTRUMENTS</text:span> (ton dictionnaire de référence).</text:p>
        </text:list-item>
        <text:list-item>
          <text:p text:style-name="P9"><text:span text:style-name="T1">Initialiser</text:span> une liste vide pour <text:span text:style-name="Source_20_Text">tracks</text:span> et les structures pour les deux arbres d'instruments.</text:p>
        </text:list-item>
        <text:list-item>
          <text:p text:style-name="P9"><text:span text:style-name="T1">Parcourir</text:span> la database (<text:span text:style-name="Source_20_Text">os.walk</text:span>) :</text:p>
          <text:list>
            <text:list-item>
              <text:p text:style-name="P9">Trouver <text:span text:style-name="Source_20_Text">trackname.txt</text:span>.</text:p>
            </text:list-item>
            <text:list-item>
              <text:p text:style-name="P9">Lire le titre.</text:p>
            </text:list-item>
            <text:list-item>
              <text:p text:style-name="P9">Calculer le chemin relatif.</text:p>
            </text:list-item>
            <text:list-item>
              <text:p text:style-name="P9"><text:span text:style-name="T1">Vérifier</text:span> les <text:span text:style-name="Source_20_Text">.pdf</text:span> du dossier : si un nom de PDF n'est pas dans <text:span text:style-name="Source_20_Text">INSTRUMENTS</text:span> (ou n'est pas une tonalité brute), <text:span text:style-name="Source_20_Text">raise Exception</text:span>.</text:p>
            </text:list-item>
            <text:list-item>
              <text:p text:style-name="P9">Ajouter au <text:span text:style-name="Source_20_Text">track_tree</text:span>.</text:p>
            </text:list-item>
          </text:list>
        </text:list-item>
        <text:list-item>
          <text:p text:style-name="P9"><text:span text:style-name="T1">Construire</text:span> l'arbre <text:span text:style-name="T1">Popular</text:span> en bouclant sur <text:span text:style-name="Source_20_Text">INSTRUMENTS</text:span>.</text:p>
        </text:list-item>
        <text:list-item>
          <text:p text:style-name="P9"><text:span text:style-name="T1">Construire</text:span> l'arbre <text:span text:style-name="T1">Classique</text:span> en bouclant sur <text:span text:style-name="Source_20_Text">INSTRUMENTS</text:span>.</text:p>
        </text:list-item>
        <text:list-item>
          <text:p text:style-name="P9"><text:span text:style-name="T1">Écrire</text:span> les 3 fichiers JSON.</text:p>
        </text:list-item>
      </text:list>
      <text:p text:style-name="Standard"/>
      <text:h text:style-name="P1" text:outline-level="2">🛠️ Cahier des Charges : <text:span text:style-name="Source_20_Text">updateDatabase.py</text:span></text:h>
      <text:h text:style-name="Heading_20_3" text:outline-level="3">1. Objectifs Principaux</text:h>
      <text:list text:style-name="L5">
        <text:list-item>
          <text:p text:style-name="P10"><text:span text:style-name="T1">Indexer</text:span> la bibliothèque musicale (Tracks).</text:p>
        </text:list-item>
        <text:list-item>
          <text:p text:style-name="P10"><text:span text:style-name="T1">Compiler</text:span> les règles métiers des instruments en formats lisibles par le web (JSON).</text:p>
        </text:list-item>
        <text:list-item>
          <text:p text:style-name="P10"><text:span text:style-name="T1">Garantir</text:span> l'intégrité de la base (Sanity Check) avant toute mise en ligne.</text:p>
        </text:list-item>
        <text:list-item>
          <text:p text:style-name="P10"><text:span text:style-name="T1">Décharger</text:span> le serveur de calculs redondants (Statique is king).</text:p>
        </text:list-item>
      </text:list>
      <text:h text:style-name="Heading_20_3" text:outline-level="3">2. Phase de Validation (Sanity Check)</text:h>
      <text:p text:style-name="Text_20_body">La moulinette doit scanner chaque dossier de morceau (<text:span text:style-name="Source_20_Text">location</text:span>) et :</text:p>
      <text:list text:style-name="L6">
        <text:list-item>
          <text:p text:style-name="P11">Identifier tous les fichiers <text:span text:style-name="Source_20_Text">.pdf</text:span>.</text:p>
        </text:list-item>
        <text:list-item>
          <text:p text:style-name="P11">Vérifier que chaque nom de PDF (sans l'extension) appartient soit à :</text:p>
          <text:list>
            <text:list-item>
              <text:p text:style-name="P11"><text:span text:style-name="Source_20_Text">INSTRUMENTS.keys()</text:span></text:p>
            </text:list-item>
            <text:list-item>
              <text:p text:style-name="P11"><text:span text:style-name="Source_20_Text">VIRTUAL_INSTRUMENTS.keys()</text:span> (les tonalités comme SIb, DO...)</text:p>
            </text:list-item>
          </text:list>
        </text:list-item>
        <text:list-item>
          <text:p text:style-name="P11"><text:span text:style-name="T1">Action en cas d'erreur :</text:span> Arrêt immédiat (<text:span text:style-name="Source_20_Text">SystemExit</text:span>) avec un message clair indiquant le morceau et le fichier fautif.</text:p>
        </text:list-item>
      </text:list>
      <text:h text:style-name="Heading_20_3" text:outline-level="3">3. Génération des Artefacts (Les 4 Fantastiques)</text:h>
      <text:h text:style-name="Heading_20_4" text:outline-level="4"><text:span text:style-name="T1">A. </text:span><text:span text:style-name="Source_20_Text"><text:span text:style-name="T1">db_tracks.json</text:span></text:span><text:span text:style-name="T1"> (Le Catalogue)</text:span></text:h>
      <text:list text:style-name="L7">
        <text:list-item>
          <text:p text:style-name="P12"><text:span text:style-name="T1">Source :</text:span> Dossiers contenant un <text:span text:style-name="Source_20_Text">trackname.txt</text:span>.</text:p>
        </text:list-item>
        <text:list-item>
          <text:p text:style-name="P12"><text:span text:style-name="T1">Format :</text:span> Liste plate d'objets.</text:p>
        </text:list-item>
        <text:list-item>
          <text:p text:style-name="P12"><text:span text:style-name="T1">Exemple :</text:span> <text:span text:style-name="Source_20_Text">{"title": "Lazy Bird", "location": "books/_rb1/lazy_bird"}</text:span>.</text:p>
        </text:list-item>
      </text:list>
      <text:h text:style-name="Heading_20_4" text:outline-level="4"><text:span text:style-name="T1">B. </text:span><text:span text:style-name="Source_20_Text"><text:span text:style-name="T1">meta_instruments.json</text:span></text:span><text:span text:style-name="T1"> (Le Registre)</text:span></text:h>
      <text:list text:style-name="L8">
        <text:list-item>
          <text:p text:style-name="P13"><text:span text:style-name="T1">Source :</text:span> Fusion de <text:span text:style-name="Source_20_Text">INSTRUMENTS</text:span> et <text:span text:style-name="Source_20_Text">VIRTUAL_INSTRUMENTS</text:span>.</text:p>
        </text:list-item>
        <text:list-item>
          <text:p text:style-name="P13"><text:span text:style-name="T1">Contenu :</text:span> Dictionnaire complet (Tona, Clef, Octave, Famille).</text:p>
        </text:list-item>
        <text:list-item>
          <text:p text:style-name="P13"><text:span text:style-name="T1">Note :</text:span> On utilise la clé technique comme <text:span text:style-name="Source_20_Text">pretty_name</text:span> pour l'instant.</text:p>
        </text:list-item>
      </text:list>
      <text:h text:style-name="Heading_20_4" text:outline-level="4"><text:span text:style-name="T1">C. </text:span><text:span text:style-name="Source_20_Text"><text:span text:style-name="T1">ui_popular.json</text:span></text:span><text:span text:style-name="T1"> (L'Arbre Métier)</text:span></text:h>
      <text:list text:style-name="L9">
        <text:list-item>
          <text:p text:style-name="P14"><text:span text:style-name="T1">Structure :</text:span> * <text:span text:style-name="Source_20_Text">MÉLODISTES</text:span> &gt; Dossiers par <text:span text:style-name="Source_20_Text">TONALITES</text:span> &gt; Liste de clés instruments.</text:p>
          <text:list>
            <text:list-item>
              <text:p text:style-name="P14"><text:span text:style-name="Source_20_Text">SECTION BASSES</text:span> &gt; Liste de clés issues de <text:span text:style-name="Source_20_Text">GROUP_BASSE</text:span>.</text:p>
            </text:list-item>
            <text:list-item>
              <text:p text:style-name="P14"><text:span text:style-name="Source_20_Text">SECTION POMPE</text:span> &gt; Liste de clés issues de <text:span text:style-name="Source_20_Text">GROUP_POMPE</text:span>.</text:p>
            </text:list-item>
            <text:list-item>
              <text:p text:style-name="P14"><text:span text:style-name="Source_20_Text">PERCUSSIONS</text:span> &gt; Liste de clés issues de <text:span text:style-name="Source_20_Text">famille == PERCUSSIONS</text:span>.</text:p>
            </text:list-item>
          </text:list>
        </text:list-item>
      </text:list>
      <text:h text:style-name="Heading_20_4" text:outline-level="4"><text:soft-page-break/><text:span text:style-name="T1">D. </text:span><text:span text:style-name="Source_20_Text"><text:span text:style-name="T1">ui_classy.json</text:span></text:span><text:span text:style-name="T1"> (L'Arbre Famille)</text:span></text:h>
      <text:list text:style-name="L10">
        <text:list-item>
          <text:p text:style-name="P16">Structure :</text:p>
          <text:list>
            <text:list-item>
              <text:p text:style-name="P15">Dossiers par <text:span text:style-name="Source_20_Text">FAMILIES</text:span> (Bois, Cuivres, Cordes...).</text:p>
            </text:list-item>
            <text:list-item>
              <text:p text:style-name="P15">Ajout du dossier <text:span text:style-name="Source_20_Text">BASSES</text:span> (copie de <text:span text:style-name="Source_20_Text">GROUP_BASSE</text:span>) pour le confort.</text:p>
            </text:list-item>
          </text:list>
        </text:list-item>
      </text:list>
      <text:p text:style-name="P17"><text:s/></text:p>
      <text:p text:style-name="P18"><text:span text:style-name="T2">/BackNScore</text:span></text:p>
      <text:p text:style-name="P4">│</text:p>
      <text:p text:style-name="P5">├── server.py <text:s text:c="14"/># SERVEUR : Point d'entrée principal </text:p>
      <text:p text:style-name="P5">│ <text:s text:c="26"/><text:span text:style-name="T3">#</text:span> (Flask/FastAPI). Distribu<text:span text:style-name="T3">e</text:span> le web</text:p>
      <text:p text:style-name="P5">│ <text:s text:c="26"/><text:span text:style-name="T3"># </text:span>et fait le pont avec .<text:span text:style-name="T3">pdf</text:span> <text:span text:style-name="T3">et .mp3</text:span></text:p>
      <text:p text:style-name="P4">│</text:p>
      <text:p text:style-name="P5">├── /scripts <text:s text:c="15"/># LOGIQUE MÉTIER : "Le Cerveau"</text:p>
      <text:p text:style-name="P5">│ <text:s text:c="26"/><text:span text:style-name="T3"># </text:span>(Importés par le serveur)</text:p>
      <text:p text:style-name="P5">│</text:p>
      <text:p text:style-name="P5">│ <text:s text:c="2"/>├── instruments.py <text:s text:c="5"/># La Source de Vérité (INSTRUMENTS,</text:p>
      <text:p text:style-name="P5">│ <text:s text:c="2"/>│ <text:s text:c="22"/><text:span text:style-name="T3"># </text:span><text:s/>Familles, Groupes).</text:p>
      <text:p text:style-name="P4">│ <text:s text:c="2"/>└── getScoreName.py <text:s text:c="4"/># Le moteur de <text:span text:style-name="T3">substitution</text:span> </text:p>
      <text:p text:style-name="P4">│</text:p>
      <text:p text:style-name="P5">├── /tools <text:s text:c="17"/># ATELIER : "La Maintenance"</text:p>
      <text:p text:style-name="P5">│ <text:s text:c="26"/><text:span text:style-name="T3"># </text:span>(Scripts exécutés manuellement)</text:p>
      <text:p text:style-name="P4">│ <text:s text:c="2"/>├── updateDatabase.py <text:s text:c="2"/># Scanne /database et génère /server_data.</text:p>
      <text:p text:style-name="P4">│ <text:s text:c="2"/>├── utest.py <text:s text:c="11"/># Banc d'essais.</text:p>
      <text:p text:style-name="P4">│ <text:s text:c="2"/>└── importMAdatabase.py # Script de migration pour <text:span text:style-name="T3">Musician Assistant</text:span>.</text:p>
      <text:p text:style-name="P4">│</text:p>
      <text:p text:style-name="P4">├── /database <text:s text:c="14"/># MATIÈRE PREMIÈRE : Ta bibliothèque physique</text:p>
      <text:p text:style-name="P4">│ <text:s text:c="2"/>└── /Etagère <text:s text:c="11"/># Dossier (ex: Jazz, Rock, Méthodes).</text:p>
      <text:p text:style-name="P4">│ <text:s text:c="6"/>└── /Livre <text:s text:c="9"/># Sous-dossier (ex: Real Book 1, Standards).</text:p>
      <text:p text:style-name="P5">│ <text:s text:c="10"/>└── /Morceau <text:s text:c="3"/># Un dossier par titre</text:p>
      <text:p text:style-name="P5">│ <text:s text:c="26"/><text:span text:style-name="T3"># </text:span>contient trackname.txt, .pd<text:span text:style-name="T3">f et .mp3</text:span></text:p>
      <text:p text:style-name="P4">│</text:p>
      <text:p text:style-name="P5">├── /server_data <text:s text:c="11"/># CACHE STATIQUE</text:p>
      <text:p text:style-name="P5">│ <text:s text:c="26"/><text:span text:style-name="T3">#</text:span> "La Mémoire Vive" <text:span text:style-name="T3">g</text:span>énéré<text:span text:style-name="T3">e</text:span> par les outils</text:p>
      <text:p text:style-name="P4">│ <text:s text:c="2"/>├── db_tracks.json <text:s text:c="5"/># Liste plate {title, location} pour le catalogue.</text:p>
      <text:p text:style-name="P5">│ <text:s text:c="2"/>├── meta_instruments.json # Registre complet des propriétés <text:span text:style-name="T3">d’instrument</text:span> <text:s text:c="2"/>├── ├── ui_popular.json <text:s text:c="4"/># Arbre de<text:span text:style-name="T3">s</text:span> <text:span text:style-name="T3">instruments mode « popular »</text:span></text:p>
      <text:p text:style-name="P5">│ <text:s text:c="2"/>└── ui_classy.json <text:s text:c="5"/># Arbre de<text:span text:style-name="T3">s</text:span> <text:span text:style-name="T3">instruments mode « classique »</text:span></text:p>
      <text:p text:style-name="P4">│</text:p>
      <text:p text:style-name="P4">└── /web <text:s text:c="19"/># FRONT-END : "L'Interface" (Servi par le serveur)</text:p>
      <text:p text:style-name="P4"><text:s text:c="4"/>├── /css <text:s text:c="15"/># Le style (Layout, Explorateur, Breadcrumb).</text:p>
      <text:p text:style-name="P5"><text:s text:c="4"/>├── /js <text:s text:c="16"/># Logique client (Navigation, Sélecteurs,</text:p>
      <text:p text:style-name="P5"><text:s text:c="4"/>│ <text:s text:c="22"/><text:span text:style-name="T3">#</text:span> Affichage PDF <text:span text:style-name="T3">u images pour Androïd 4,</text:span></text:p>
      <text:p text:style-name="P4"><text:s text:c="4"/>└── index.html <text:s text:c="9"/># Page <text:span text:style-name="T3">d’accueil</text:span> musicien<text:span text:style-name="T3">s et chef</text:span>.</text:p>
      <text:p text:style-name="P3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21:58:43.942175958</meta:creation-date>
    <dc:date>2026-04-23T23:13:36.854123845</dc:date>
    <meta:editing-duration>PT1H14M5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107" meta:word-count="861" meta:character-count="5761" meta:non-whitespace-character-count="4601"/>
  </office:meta>
</office:document-meta>
</file>