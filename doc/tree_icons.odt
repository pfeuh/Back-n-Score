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🎯 Ta palette finale (très propre)</text:h>
      <text:section text:style-name="Sect1" text:name="code-block-viewer">
        <text:p text:style-name="P1">🗄️ étagère</text:p>
        <text:p text:style-name="Preformatted_20_Text">📘 livre</text:p>
        <text:p text:style-name="Preformatted_20_Text">🎵 track</text:p>
        <text:p text:style-name="Preformatted_20_Text">🎼 partition</text:p>
        <text:p text:style-name="Preformatted_20_Text">💿 audio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22:23:03.144432201</meta:creation-date>
    <dc:date>2026-04-16T22:23:40.695999901</dc:date>
    <meta:editing-duration>PT39S</meta:editing-duration>
    <meta:editing-cycles>1</meta:editing-cycles>
    <meta:document-statistic meta:table-count="0" meta:image-count="0" meta:object-count="0" meta:page-count="1" meta:paragraph-count="6" meta:word-count="16" meta:character-count="74" meta:non-whitespace-character-count="64"/>
    <meta:generator>LibreOffice/24.2.7.2$Linux_X86_64 LibreOffice_project/420$Build-2</meta:generator>
  </office:meta>
</office:document-meta>
</file>