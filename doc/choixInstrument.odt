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left"/>
    </style:style>
    <style:style style:name="Tableau1.A" style:family="table-column">
      <style:table-column-properties style:column-width="1.623cm"/>
    </style:style>
    <style:style style:name="Tableau1.B" style:family="table-column">
      <style:table-column-properties style:column-width="3.263cm"/>
    </style:style>
    <style:style style:name="Tableau1.C" style:family="table-column">
      <style:table-column-properties style:column-width="12.114cm"/>
    </style:style>
    <style:style style:name="Tableau1.A1" style:family="table-cell">
      <style:table-cell-properties style:vertical-align="middle" fo:padding="0.049cm" fo:border="none"/>
    </style:style>
    <style:style style:name="Tableau2" style:family="table">
      <style:table-properties style:width="17cm" table:align="left"/>
    </style:style>
    <style:style style:name="Tableau2.A" style:family="table-column">
      <style:table-column-properties style:column-width="1.623cm"/>
    </style:style>
    <style:style style:name="Tableau2.B" style:family="table-column">
      <style:table-column-properties style:column-width="3.17cm"/>
    </style:style>
    <style:style style:name="Tableau2.C" style:family="table-column">
      <style:table-column-properties style:column-width="12.208cm"/>
    </style:style>
    <style:style style:name="Tableau2.A1" style:family="table-cell">
      <style:table-cell-properties style:vertical-align="middle" fo:padding="0.049cm" fo:border="none"/>
    </style:style>
    <style:style style:name="P1" style:family="paragraph" style:parent-style-name="Heading_20_2">
      <style:paragraph-properties fo:break-before="page"/>
    </style:style>
    <style:style style:name="P2" style:family="paragraph" style:parent-style-name="Heading_20_3" style:list-style-name="L13"/>
    <style:style style:name="P3" style:family="paragraph" style:parent-style-name="Heading_20_4">
      <style:text-properties fo:font-weight="bold"/>
    </style:style>
    <style:style style:name="P4" style:family="paragraph" style:parent-style-name="Quotations">
      <style:text-properties fo:font-style="italic"/>
    </style:style>
    <style:style style:name="P5" style:family="paragraph" style:parent-style-name="Table_20_Contents">
      <style:text-properties fo:font-weight="bold"/>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paragraph-properties fo:margin-top="0cm" fo:margin-bottom="0cm" style:contextual-spacing="false"/>
    </style:style>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7"/>
    <style:style style:name="P24" style:family="paragraph" style:parent-style-name="Text_20_body" style:list-style-name="L18"/>
    <style:style style:name="T1" style:family="text">
      <style:text-properties fo:font-weight="bold"/>
    </style:style>
    <style:style style:name="T2" style:family="text">
      <style:text-properties officeooo:rsid="0017de66"/>
    </style:style>
    <style:style style:name="T3" style:family="text">
      <style:text-properties fo:font-style="italic"/>
    </style:style>
    <style:style style:name="T4" style:family="text">
      <style:text-properties officeooo:rsid="0019c37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Voici un résumé clair et structuré du cahier des charges tel que nous l'avons défini pour cette page de sélection. L'objectif reste la <text:span text:style-name="T1">fiabilité totale</text:span> sur tes tablettes Android 4.</text:p>
      <text:h text:style-name="Heading_20_3" text:outline-level="3">1. Structure de l'écran (Navigation)</text:h>
      <text:list text:style-name="L1">
        <text:list-item>
          <text:p text:style-name="P6"><text:span text:style-name="T1">Emplacement :</text:span> Tout se passe dans le <text:span text:style-name="Source_20_Text">div content</text:span> (la zone principale).</text:p>
        </text:list-item>
        <text:list-item>
          <text:p text:style-name="P6"><text:span text:style-name="T1">Affichage :</text:span> Le menu de sélection masque temporairement la partition pour utiliser toute la surface disponible.</text:p>
        </text:list-item>
        <text:list-item>
          <text:p text:style-name="P6"><text:span text:style-name="T1">Dimensions :</text:span> Largeur 100%, avec une hauteur de bandeau fixe pour la partie "Voix".</text:p>
        </text:list-item>
      </text:list>
      <text:h text:style-name="Heading_20_3" text:outline-level="3">2. Bandeau de sélection des Voix (Le "Quoi")</text:h>
      <text:list text:style-name="L2">
        <text:list-item>
          <text:p text:style-name="P7"><text:span text:style-name="T1">Contenu :</text:span> 4 boutons numérotés de <text:span text:style-name="T1">1 à 4</text:span> + 1 bouton <text:span text:style-name="T1">Annuler</text:span> en fin de ligne.</text:p>
        </text:list-item>
        <text:list-item>
          <text:p text:style-name="P7"><text:span text:style-name="T1">Logique de couleur :</text:span> * Bouton sélectionné : <text:span text:style-name="T1">Vert</text:span>.</text:p>
          <text:list>
            <text:list-item>
              <text:p text:style-name="P7">Boutons non sélectionnés : <text:span text:style-name="T1">Rouge</text:span>.</text:p>
            </text:list-item>
          </text:list>
        </text:list-item>
        <text:list-item>
          <text:p text:style-name="P7"><text:span text:style-name="T1">Comportement :</text:span> La voix par défaut est <text:span text:style-name="T1">1</text:span>. Le clic sur un chiffre change immédiatement la couleur (feedback visuel instantané).</text:p>
        </text:list-item>
        <text:list-item>
          <text:p text:style-name="P7"><text:span text:style-name="T1">Annulation :</text:span> Le bouton "Annuler" permet de fermer le menu sans valider de nouveau choix.</text:p>
        </text:list-item>
      </text:list>
      <text:h text:style-name="Heading_20_3" text:outline-level="3">3. Arbre des Instruments (Le "Qui")</text:h>
      <text:list text:style-name="L3">
        <text:list-item>
          <text:p text:style-name="P8"><text:span text:style-name="T1">Organisation :</text:span> Environ <text:span text:style-name="T1">90 instruments</text:span> classés par familles naturelles (Bois, Cuivres, Cordes, etc.).</text:p>
        </text:list-item>
        <text:list-item>
          <text:p text:style-name="P8"><text:span text:style-name="T1">Système de "Dossier Ouvert" :</text:span> * Affichage sous forme d'arbre (Tree).</text:p>
          <text:list>
            <text:list-item>
              <text:p text:style-name="P8"><text:span text:style-name="T1">Un seul dossier ouvert à la fois</text:span> : cliquer sur une nouvelle famille ferme automatiquement la précédente pour éviter le scroll infini.</text:p>
            </text:list-item>
          </text:list>
        </text:list-item>
        <text:list-item>
          <text:p text:style-name="P8"><text:span text:style-name="T1">Surlignage :</text:span> L'instrument actuellement actif est mis en évidence (ex: fond bleu ou texte blanc) pour que le musicien sache où il en est.</text:p>
        </text:list-item>
      </text:list>
      <text:h text:style-name="Heading_20_3" text:outline-level="3">4. Persistance et Technique</text:h>
      <text:list text:style-name="L4">
        <text:list-item>
          <text:p text:style-name="P9"><text:span text:style-name="T1">Sauvegarde :</text:span> L'instrument et la voix choisis sont stockés dans le <text:span text:style-name="Source_20_Text">localStorage</text:span>. Ils survivent à un rafraîchissement de page (F5) ou à une coupure de courant.</text:p>
        </text:list-item>
        <text:list-item>
          <text:p text:style-name="P9"><text:span text:style-name="T1">Compatibilité Android 4 :</text:span> * Utilisation exclusive de <text:span text:style-name="Source_20_Text">var</text:span> (pas de <text:span text:style-name="Source_20_Text">const</text:span>/<text:span text:style-name="Source_20_Text">let</text:span>).</text:p>
          <text:list>
            <text:list-item>
              <text:p text:style-name="P9">Pas de Flexbox (utilisation de <text:span text:style-name="Source_20_Text">%</text:span> et <text:span text:style-name="Source_20_Text">inline-block</text:span>).</text:p>
            </text:list-item>
            <text:list-item>
              <text:p text:style-name="P9">Syntaxes HTML/JS simplifiées pour éviter les erreurs de lecture du vieux navigateur.</text:p>
            </text:list-item>
          </text:list>
        </text:list-item>
      </text:list>
      <text:h text:style-name="Heading_20_3" text:outline-level="3">5. Interaction Serveur</text:h>
      <text:list text:style-name="L5">
        <text:list-item>
          <text:p text:style-name="P10"><text:span text:style-name="T1">Rôle du client :</text:span> Envoie l'ID unique, l'Instrument et la Voix.</text:p>
        </text:list-item>
        <text:list-item>
          <text:p text:style-name="P10"><text:span text:style-name="T1">Rôle du serveur :</text:span> Reçoit ces infos et décide quelle image envoyer (originale ou substitution).</text:p>
        </text:list-item>
      </text:list>
      <text:p text:style-name="Text_20_body"><text:soft-page-break/><text:span text:style-name="T1">Prochaine étape (quand tu auras le temps) :</text:span> Tester le bandeau rouge/vert sur la tablette pour voir si la taille des boutons te convient.</text:p>
      <text:h text:style-name="Heading_20_2" text:outline-level="2"/>
      <text:h text:style-name="P1" text:outline-level="2">📄 Cahier des Charges : Algorithme de Recherche "Popular" (Back'n Score)</text:h>
      <text:p text:style-name="Text_20_body">Le mode <text:span text:style-name="T1">Popular</text:span> est conçu pour maximiser les chances de trouver une partition jouable pour un musicien, même si l'instrument exact est manquant. Il privilégie le rôle musical (basse, pompe, mélodie) et la tonalité.</text:p>
      <text:h text:style-name="Heading_20_3" text:outline-level="3">1. Prise en charge des Groupes Métiers</text:h>
      <text:p text:style-name="Text_20_body">L'algorithme identifie d'abord si l'instrument appartient à une section spécifique définie dans <text:span text:style-name="Source_20_Text">instruments.py</text:span> :</text:p>
      <text:list text:style-name="L6">
        <text:list-item>
          <text:p text:style-name="P11"><text:span text:style-name="T1">Section BASSE :</text:span> Instruments avec octave <text:span text:style-name="Source_20_Text">-2</text:span> ou présents dans <text:span text:style-name="Source_20_Text">GROUP_BASSE</text:span>.</text:p>
        </text:list-item>
        <text:list-item>
          <text:p text:style-name="P11"><text:span text:style-name="T1">Section POMPE :</text:span> Instruments de la famille <text:span text:style-name="Source_20_Text">CLAVIERS</text:span> ou présents dans <text:span text:style-name="Source_20_Text">GROUP_POMPE</text:span>.</text:p>
        </text:list-item>
        <text:list-item>
          <text:p text:style-name="P11"><text:span text:style-name="T1">Section PERCUSSION :</text:span> Instruments de la famille <text:span text:style-name="Source_20_Text">PERCUSSIONS</text:span>.</text:p>
        </text:list-item>
      </text:list>
      <text:h text:style-name="Heading_20_3" text:outline-level="3">2. Hiérarchie de Recherche (Ordre de priorité)</text:h>
      <text:p text:style-name="Text_20_body">Le script parcourt les étapes suivantes et s'arrête dès qu'un fichier PDF correspondant est trouvé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Priorité</text:p>
            </table:table-cell>
            <table:table-cell table:style-name="Tableau1.A1" office:value-type="string">
              <text:p text:style-name="Table_20_Heading">Niveau de recherche</text:p>
            </table:table-cell>
            <table:table-cell table:style-name="Tableau1.A1" office:value-type="string">
              <text:p text:style-name="Table_20_Heading">Logique appliquée</text:p>
            </table:table-cell>
          </table:table-row>
        </table:table-header-rows>
        <table:table-row>
          <table:table-cell table:style-name="Tableau1.A1" office:value-type="string">
            <text:p text:style-name="P5">1</text:p>
          </table:table-cell>
          <table:table-cell table:style-name="Tableau1.A1" office:value-type="string">
            <text:p text:style-name="P5">Identité</text:p>
          </table:table-cell>
          <table:table-cell table:style-name="Tableau1.A1" office:value-type="string">
            <text:p text:style-name="Table_20_Contents">Recherche du nom exact (ex: <text:span text:style-name="Source_20_Text">trompette.pdf</text:span>).</text:p>
          </table:table-cell>
        </table:table-row>
        <table:table-row>
          <table:table-cell table:style-name="Tableau1.A1" office:value-type="string">
            <text:p text:style-name="P5">2</text:p>
          </table:table-cell>
          <table:table-cell table:style-name="Tableau1.A1" office:value-type="string">
            <text:p text:style-name="P5">Groupe Métier</text:p>
          </table:table-cell>
          <table:table-cell table:style-name="Tableau1.A1" office:value-type="string">
            <text:p text:style-name="Table_20_Contents">Recherche d'un "collègue" du même groupe (ex: <text:span text:style-name="Source_20_Text">tuba</text:span> pour <text:span text:style-name="Source_20_Text">basse</text:span>) ayant la <text:span text:style-name="T1">même tonalité</text:span>.</text:p>
          </table:table-cell>
        </table:table-row>
        <table:table-row>
          <table:table-cell table:style-name="Tableau1.A1" office:value-type="string">
            <text:p text:style-name="P5">3</text:p>
          </table:table-cell>
          <table:table-cell table:style-name="Tableau1.A1" office:value-type="string">
            <text:p text:style-name="P5">Tonalité Pure</text:p>
          </table:table-cell>
          <table:table-cell table:style-name="Tableau1.A1" office:value-type="string">
            <text:p text:style-name="Table_20_Contents">Recherche d'un fichier nommé uniquement par la tonalité (ex: <text:span text:style-name="Source_20_Text">SIb.pdf</text:span>, <text:span text:style-name="Source_20_Text">DO.pdf</text:span>).</text:p>
          </table:table-cell>
        </table:table-row>
        <table:table-row>
          <table:table-cell table:style-name="Tableau1.A1" office:value-type="string">
            <text:p text:style-name="P5">4</text:p>
          </table:table-cell>
          <table:table-cell table:style-name="Tableau1.A1" office:value-type="string">
            <text:p text:style-name="P5">Similitude stricte</text:p>
          </table:table-cell>
          <table:table-cell table:style-name="Tableau1.A1" office:value-type="string">
            <text:p text:style-name="Table_20_Contents">Recherche d'un instrument de la <text:span text:style-name="T1">même tonalité</text:span> ET de la <text:span text:style-name="T1">même octave</text:span>.</text:p>
          </table:table-cell>
        </table:table-row>
        <table:table-row>
          <table:table-cell table:style-name="Tableau1.A1" office:value-type="string">
            <text:p text:style-name="P5">5</text:p>
          </table:table-cell>
          <table:table-cell table:style-name="Tableau1.A1" office:value-type="string">
            <text:p text:style-name="P5">Similitude large</text:p>
          </table:table-cell>
          <table:table-cell table:style-name="Tableau1.A1" office:value-type="string">
            <text:p text:style-name="Table_20_Contents">Recherche d'un instrument de la <text:span text:style-name="T1">même tonalité</text:span> (peu importe l'octave).</text:p>
          </table:table-cell>
        </table:table-row>
        <table:table-row>
          <table:table-cell table:style-name="Tableau1.A1" office:value-type="string">
            <text:p text:style-name="P5">6</text:p>
          </table:table-cell>
          <table:table-cell table:style-name="Tableau1.A1" office:value-type="string">
            <text:p text:style-name="P5">Dernier Recours</text:p>
          </table:table-cell>
          <table:table-cell table:style-name="Tableau1.A1" office:value-type="string">
            <text:p text:style-name="Table_20_Contents">Substitution par une <text:span text:style-name="T1">Grille d'accords</text:span> (pour Basse/Pompe) ou les <text:span text:style-name="T1">Paroles</text:span> (pour le Chant).</text:p>
          </table:table-cell>
        </table:table-row>
      </table:table>
      <text:p text:style-name="P12">Exporter vers Sheets</text:p>
      <text:p text:style-name="Horizontal_20_Line"/>
      <text:h text:style-name="Heading_20_3" text:outline-level="3">3. Règles de Substitution Spécifiques</text:h>
      <text:h text:style-name="P3" text:outline-level="4">A. Section Rythmique (Basse &amp; Pompe)</text:h>
      <text:p text:style-name="Text_20_body">Si aucune partition d'instrument n'est trouvée après le balayage des tonalités :</text:p>
      <text:list text:style-name="L7">
        <text:list-item>
          <text:p text:style-name="P13">Chercher <text:span text:style-name="Source_20_Text">grille_[tonalité].pdf</text:span> (ex: <text:span text:style-name="Source_20_Text">grille_sib.pdf</text:span>).</text:p>
        </text:list-item>
        <text:list-item>
          <text:p text:style-name="P13">Si absent, chercher <text:span text:style-name="Source_20_Text">grille.pdf</text:span> (le standard en DO).</text:p>
        </text:list-item>
      </text:list>
      <text:h text:style-name="P3" text:outline-level="4">B. Section Vocale</text:h>
      <text:list text:style-name="L8">
        <text:list-item>
          <text:p text:style-name="P14">Si le <text:span text:style-name="T1">Chant</text:span> est demandé mais absent : chercher <text:span text:style-name="Source_20_Text">paroles.pdf</text:span>.</text:p>
        </text:list-item>
        <text:list-item>
          <text:p text:style-name="P14"><text:soft-page-break/>Si les <text:span text:style-name="T1">Paroles</text:span> sont demandées mais absentes : chercher <text:span text:style-name="Source_20_Text">chant.pdf</text:span> (car il contient le texte).</text:p>
        </text:list-item>
      </text:list>
      <text:h text:style-name="P3" text:outline-level="4">C. Section Percussion</text:h>
      <text:list text:style-name="L9">
        <text:list-item>
          <text:p text:style-name="P15">Priorité aux membres du groupe/famille.</text:p>
        </text:list-item>
        <text:list-item>
          <text:p text:style-name="P15">En cas d'absence totale, le script peut proposer le premier PDF disponible dans le dossier (considéré comme conducteur rythmique).</text:p>
        </text:list-item>
      </text:list>
      <text:p text:style-name="Horizontal_20_Line"/>
      <text:h text:style-name="Heading_20_3" text:outline-level="3">4. Gestion des Erreurs</text:h>
      <text:p text:style-name="Text_20_body">Si aucune des étapes ci-dessus ne permet de trouver un fichier :</text:p>
      <text:list text:style-name="L10">
        <text:list-item>
          <text:p text:style-name="P16">L'algorithme ne renvoie rien (<text:span text:style-name="Source_20_Text">None</text:span>).</text:p>
        </text:list-item>
        <text:list-item>
          <text:p text:style-name="P16">Un message d'erreur explicite est généré via <text:span text:style-name="Source_20_Text">_set_error</text:span> indiquant la tonalité et l'octave qui ont été recherchées sans succès.</text:p>
        </text:list-item>
      </text:list>
      <text:p text:style-name="Horizontal_20_Line"/>
      <text:h text:style-name="Heading_20_3" text:outline-level="3">5. Post-traitement des Voix</text:h>
      <text:p text:style-name="Text_20_body">Une fois l'instrument (ou son substitut) trouvé, le script vérifie si une voix spécifique (2, 3 ou 4) est demandée :</text:p>
      <text:list text:style-name="L11">
        <text:list-item>
          <text:p text:style-name="P17">Si <text:span text:style-name="Source_20_Text">voice=2</text:span>, il cherche <text:span text:style-name="Source_20_Text">nom_instrument2.pdf</text:span>.</text:p>
        </text:list-item>
        <text:list-item>
          <text:p text:style-name="P17">Si la voix spécifique n'existe pas, il renvoie une erreur (on ne substitue pas une voix par une autre automatiquement pour éviter les cacophonies en section).</text:p>
        </text:list-item>
      </text:list>
      <text:p text:style-name="Horizontal_20_Line"/>
      <text:p text:style-name="Standard"/>
      <text:h text:style-name="P1" text:outline-level="2">🎻 Cahier des Charges : Mode Classique (Orchestre / Harmonie)</text:h>
      <text:p text:style-name="Text_20_body">L'objectif du mode <text:span text:style-name="T1">Classique</text:span> est de respecter l'orchestration et le registre technique de chaque musicien. Contrairement au mode Popular, il est intransigeant sur la tessiture et la famille d'instrument, sauf pour la section rythmique grave.</text:p>
      <text:h text:style-name="Heading_20_3" text:outline-level="3">1. Hiérarchie de Recherche (Ordre de priorité)</text:h>
      <text:p text:style-name="Text_20_body">Le script s'arrête dès qu'une condition est remplie :</text:p>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Table_20_Heading">Priorité</text:p>
            </table:table-cell>
            <table:table-cell table:style-name="Tableau2.A1" office:value-type="string">
              <text:p text:style-name="Table_20_Heading">Niveau de recherche</text:p>
            </table:table-cell>
            <table:table-cell table:style-name="Tableau2.A1" office:value-type="string">
              <text:p text:style-name="Table_20_Heading">Logique appliquée</text:p>
            </table:table-cell>
          </table:table-row>
        </table:table-header-rows>
        <table:table-row>
          <table:table-cell table:style-name="Tableau2.A1" office:value-type="string">
            <text:p text:style-name="P5">1</text:p>
          </table:table-cell>
          <table:table-cell table:style-name="Tableau2.A1" office:value-type="string">
            <text:p text:style-name="P5">Identité Exacte</text:p>
          </table:table-cell>
          <table:table-cell table:style-name="Tableau2.A1" office:value-type="string">
            <text:p text:style-name="Table_20_Contents">Recherche du nom de l'instrument (ex: <text:span text:style-name="Source_20_Text">clarinette.pdf</text:span>).</text:p>
          </table:table-cell>
        </table:table-row>
        <table:table-row>
          <table:table-cell table:style-name="Tableau2.A1" office:value-type="string">
            <text:p text:style-name="P5">2</text:p>
          </table:table-cell>
          <table:table-cell table:style-name="Tableau2.A1" office:value-type="string">
            <text:p text:style-name="P5">Transposition</text:p>
          </table:table-cell>
          <table:table-cell table:style-name="Tableau2.A1" office:value-type="string">
            <text:p text:style-name="Table_20_Contents">Recherche du fichier par sa tonalité pure (ex: <text:span text:style-name="Source_20_Text">SIb</text:span> pour une trompette).</text:p>
          </table:table-cell>
        </table:table-row>
        <table:table-row>
          <table:table-cell table:style-name="Tableau2.A1" office:value-type="string">
            <text:p text:style-name="P5">3</text:p>
          </table:table-cell>
          <table:table-cell table:style-name="Tableau2.A1" office:value-type="string">
            <text:p text:style-name="P5">Groupe BASSE</text:p>
          </table:table-cell>
          <table:table-cell table:style-name="Tableau2.A1" office:value-type="string">
            <text:p text:style-name="Table_20_Contents"><text:span text:style-name="T1">Exception :</text:span> Si l'instrument est en octave <text:span text:style-name="Source_20_Text">-2</text:span>, recherche de n'importe quel membre de <text:span text:style-name="Source_20_Text">GROUP_BASSE</text:span> (ex: <text:span text:style-name="Source_20_Text">tuba</text:span> pour <text:span text:style-name="Source_20_Text">contrebasse</text:span>).</text:p>
          </table:table-cell>
        </table:table-row>
        <table:table-row>
          <table:table-cell table:style-name="Tableau2.A1" office:value-type="string">
            <text:p text:style-name="P5">4</text:p>
          </table:table-cell>
          <table:table-cell table:style-name="Tableau2.A1" office:value-type="string">
            <text:p text:style-name="P5">Substitution Strict</text:p>
          </table:table-cell>
          <table:table-cell table:style-name="Tableau2.A1" office:value-type="string">
            <text:p text:style-name="Table_20_Contents">Recherche d'un instrument ayant <text:span text:style-name="T1">Même Tonalité</text:span> <text:span text:style-name="T4">et </text:span><text:span text:style-name="T1">Même Clef</text:span> <text:span text:style-name="T4">et </text:span><text:span text:style-name="T1">Même Octave</text:span> <text:span text:style-name="T4">et</text:span> <text:span text:style-name="T1">Même Famille</text:span>.</text:p>
          </table:table-cell>
        </table:table-row>
      </table:table>
      <text:p text:style-name="P12"/>
      <text:h text:style-name="Heading_20_3" text:outline-level="3">2. Les Règles de Rigueur (Garde-fous)</text:h>
      <text:list text:style-name="L16">
        <text:list-item>
          <text:p text:style-name="P22"><text:span text:style-name="T1">Verrou de Famille :</text:span> Un instrument mélodique ou harmonique ne peut pas en remplacer un autre d'une famille différente.</text:p>
          <text:list>
            <text:list-item>
              <text:p text:style-name="P22"><text:span text:style-name="T3">Exemple :</text:span> Une <text:span text:style-name="Source_20_Text">guitare</text:span> (Cordes pincées) ne recevra <text:span text:style-name="T1">jamais</text:span> la partition d'un <text:span text:style-name="Source_20_Text">piano</text:span> (Claviers), même s'ils partagent la même tonalité et la même clef.</text:p>
            </text:list-item>
          </text:list>
        </text:list-item>
        <text:list-item>
          <text:p text:style-name="P22"><text:span text:style-name="T1">Intégrité de l'Octave :</text:span> Aucun saut d'octave n'est autorisé. Si une partition est écrite trop haut ou trop bas pour l'instrument demandé, le script renvoie une erreur.</text:p>
        </text:list-item>
        <text:list-item>
          <text:p text:style-name="P22"><text:span text:style-name="T1">Respect de la Clef :</text:span> La substitution ne se fait qu'entre instruments lisant la même clef (un violoniste ne recevra pas une partition en clef de Fa).</text:p>
        </text:list-item>
        <text:list-item>
          <text:p text:style-name="P22"><text:span text:style-name="T1">Exclusion des Secours "Pop" :</text:span> Les fichiers de type <text:span text:style-name="Source_20_Text">grille.pdf</text:span> ou <text:span text:style-name="Source_20_Text">paroles.pdf</text:span> sont systématiquement ignorés. En classique, si la partie n'est pas écrite, on ne joue pas.</text:p>
        </text:list-item>
      </text:list>
      <text:p text:style-name="Horizontal_20_Line"/>
      <text:h text:style-name="Heading_20_3" text:outline-level="3">3. Gestion du Pupitre (Recyclage des Voix)</text:h>
      <text:p text:style-name="Text_20_body">Le mode Classique gère la répartition des musiciens au sein d'un même pupitre par une descente d'escalier automatique :</text:p>
      <text:list text:style-name="L17">
        <text:list-item>
          <text:p text:style-name="P23"><text:span text:style-name="T1">Principe :</text:span> Si une voix spécifique est demandée (ex: voix 4) mais n'existe pas physiquement sur le disque, le script cherche la voix immédiatement inférieure (<text:span text:style-name="Source_20_Text">voix 3</text:span>, puis <text:span text:style-name="Source_20_Text">voix 2</text:span>, puis enfin l'instrument racine ou <text:span text:style-name="Source_20_Text">voix 1</text:span>).</text:p>
        </text:list-item>
        <text:list-item>
          <text:p text:style-name="P23"><text:span text:style-name="T1">Objectif :</text:span> Permettre aux musiciens de doubler une partie existante plutôt que de ne rien jouer.</text:p>
        </text:list-item>
      </text:list>
      <text:p text:style-name="Horizontal_20_Line"/>
      <text:h text:style-name="Heading_20_3" text:outline-level="3"><text:soft-page-break/>4. Cas Particulier : La Section Basse (Harmonie)</text:h>
      <text:p text:style-name="Text_20_body">Par pragmatisme musical, la section <text:span text:style-name="T1">Basse</text:span> (octave <text:span text:style-name="Source_20_Text">-2</text:span>) bénéficie d'une souplesse de groupe.</text:p>
      <text:list text:style-name="L18">
        <text:list-item>
          <text:p text:style-name="P24">Le Tuba, le Soubassophone, la Contrebasse et la Basse électrique sont considérés comme interchangeables si et seulement si ils partagent la même tonalité (Ut, SIb, etc.).</text:p>
        </text:list-item>
      </text:list>
      <text:p text:style-name="Horizontal_20_Line"/>
      <text:h text:style-name="Heading_20_3" text:outline-level="3">5. Gestion des Erreurs</text:h>
      <text:p text:style-name="Text_20_body">En cas d'échec total, le script génère un message d'erreur technique détaillé via <text:span text:style-name="Source_20_Text">_set_error</text:span> précisant les paramètres recherchés (Tonalité, Clef, Octave) pour aider à identifier la partition manquante dans la base de données.</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8T15:38:16.880894121</meta:creation-date>
    <dc:date>2026-04-23T19:28:04.315783510</dc:date>
    <meta:editing-duration>PT1H28M40S</meta:editing-duration>
    <meta:editing-cycles>4</meta:editing-cycles>
    <meta:generator>LibreOffice/24.2.7.2$Linux_X86_64 LibreOffice_project/420$Build-2</meta:generator>
    <meta:document-statistic meta:table-count="2" meta:image-count="0" meta:object-count="0" meta:page-count="6" meta:paragraph-count="109" meta:word-count="1203" meta:character-count="7355" meta:non-whitespace-character-count="6300"/>
  </office:meta>
</office:document-meta>
</file>