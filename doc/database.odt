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5.265cm" table:align="left"/>
    </style:style>
    <style:style style:name="Tableau1.A" style:family="table-column">
      <style:table-column-properties style:column-width="2.284cm"/>
    </style:style>
    <style:style style:name="Tableau1.B" style:family="table-column">
      <style:table-column-properties style:column-width="3.565cm"/>
    </style:style>
    <style:style style:name="Tableau1.C" style:family="table-column">
      <style:table-column-properties style:column-width="4.062cm"/>
    </style:style>
    <style:style style:name="Tableau1.D" style:family="table-column">
      <style:table-column-properties style:column-width="5.353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5.547cm"/>
    </style:style>
    <style:style style:name="Tableau2.B" style:family="table-column">
      <style:table-column-properties style:column-width="4.221cm"/>
    </style:style>
    <style:style style:name="Tableau2.C" style:family="table-column">
      <style:table-column-properties style:column-width="5.286cm"/>
    </style:style>
    <style:style style:name="Tableau2.D" style:family="table-column">
      <style:table-column-properties style:column-width="1.946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Table_20_Contents">
      <style:text-properties fo:font-weight="bold"/>
    </style:style>
    <style:style style:name="P5" style:family="paragraph" style:parent-style-name="Table_20_Contents">
      <style:text-properties fo:font-style="italic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ocumentation : Structure de la Base de Données BNS</text:h>
      <text:p text:style-name="Text_20_body">La base de données est organisée de manière hiérarchique. L'utilisation du <text:span text:style-name="T1">CamelCase</text:span> pour les dossiers structurels permet de garantir la compatibilité système tout en conservant une lisibilité humaine optimale (reconstruction du nom avec espaces virtuels).</text:p>
      <text:h text:style-name="Heading_20_3" text:outline-level="3">1. Hiérarchie Structurelle</text:h>
      <text:list text:style-name="L1">
        <text:list-item>
          <text:p text:style-name="P7"><text:span text:style-name="T1">Étagère (Shelf)</text:span> : Un dossier conteneur. Une étagère peut contenir d'autres étagères ou des livres.</text:p>
        </text:list-item>
        <text:list-item>
          <text:p text:style-name="P7"><text:span text:style-name="T1">Livre (Book)</text:span> : Un dossier regroupant un ensemble cohérent de morceaux (ex: un auteur, un groupe spécifique).</text:p>
        </text:list-item>
        <text:list-item>
          <text:p text:style-name="P7"><text:span text:style-name="T1">Morceau (Track)</text:span> : L'unité finale. C'est un dossier "conteneur complet" qui regroupe tous les médias liés à une œuvre.</text:p>
        </text:list-item>
      </text:list>
      <text:h text:style-name="Heading_20_3" text:outline-level="3">2. Représentation Visuelle (Arborescence)</text:h>
      <text:p text:style-name="P2">Plaintext</text:p>
      <text:p text:style-name="Preformatted_20_Text"><text:span text:style-name="Source_20_Text">database/</text:span></text:p>
      <text:p text:style-name="Preformatted_20_Text"><text:span text:style-name="Source_20_Text">└── bands/ <text:s text:c="25"/>&lt;-- Étagère (Shelf)</text:span></text:p>
      <text:p text:style-name="Preformatted_20_Text"><text:span text:style-name="Source_20_Text"><text:s text:c="4"/>└── PierreFaller/ <text:s text:c="14"/>&lt;-- Livre (Book)</text:span></text:p>
      <text:p text:style-name="Preformatted_20_Text"><text:span text:style-name="Source_20_Text"><text:s text:c="8"/>├── BlueBossa/ <text:s text:c="13"/>&lt;-- Dossier du morceau</text:span></text:p>
      <text:p text:style-name="Preformatted_20_Text"><text:span text:style-name="Source_20_Text"><text:s text:c="8"/>│ <text:s text:c="2"/>├── trackname.txt <text:s text:c="6"/>&lt;-- Nom propre : "Blue Bossa"</text:span></text:p>
      <text:p text:style-name="Preformatted_20_Text"><text:span text:style-name="Source_20_Text"><text:s text:c="8"/>│ <text:s text:c="2"/>├── SIb.pdf <text:s text:c="12"/>&lt;-- Partition (Standard BNS)</text:span></text:p>
      <text:p text:style-name="Preformatted_20_Text"><text:span text:style-name="Source_20_Text"><text:s text:c="8"/>│ <text:s text:c="2"/>├── UT.pdf <text:s text:c="13"/>&lt;-- Partition (Standard BNS)</text:span></text:p>
      <text:p text:style-name="Preformatted_20_Text"><text:span text:style-name="Source_20_Text"><text:s text:c="8"/>│ <text:s text:c="2"/>├── Reference.mp3 <text:s text:c="6"/>&lt;-- Média : Accompagnement / Playback</text:span></text:p>
      <text:p text:style-name="Preformatted_20_Text"><text:span text:style-name="Source_20_Text"><text:s text:c="8"/>└── OyeComoVa/</text:span></text:p>
      <text:p text:style-name="Preformatted_20_Text"><text:span text:style-name="Source_20_Text"><text:s text:c="12"/>├── trackname.txt</text:span></text:p>
      <text:p text:style-name="Preformatted_20_Text"><text:span text:style-name="Source_20_Text"><text:s text:c="12"/>└── ...</text:span></text:p>
      <text:p text:style-name="Preformatted_20_Text"><text:span text:style-name="Source_20_Text"><text:s text:c="4"/>└── JazzStandards/ <text:s text:c="13"/>&lt;-- Autre Étagère</text:span></text:p>
      <text:p text:style-name="Preformatted_20_Text"><text:span text:style-name="Source_20_Text"><text:s text:c="8"/>└── RealBookVol1/ <text:s text:c="10"/>&lt;-- Livre</text:span></text:p>
      <text:p text:style-name="P1"><text:span text:style-name="Source_20_Text"><text:s text:c="12"/>└── AllTheThingsYouAre/ &lt;-- Morceau</text:span></text:p>
      <text:h text:style-name="Heading_20_3" text:outline-level="3">3. Règles d'Intégrité du Morceau</text:h>
      <text:p text:style-name="Text_20_body">Un dossier de morceau est considéré comme valide par BNS s'il respecte ces conditions :</text:p>
      <text:list text:style-name="L2">
        <text:list-item>
          <text:p text:style-name="P8"><text:span text:style-name="T1">Le fichier </text:span><text:span text:style-name="Source_20_Text"><text:span text:style-name="T1">trackname.txt</text:span></text:span> : C'est la "carte d'identité". Sans lui, le morceau n'existe pas pour l'application. Il contient le nom affiché (ex: <text:span text:style-name="Source_20_Text">L'Été Indien</text:span>).</text:p>
        </text:list-item>
        <text:list-item>
          <text:p text:style-name="P8"><text:span text:style-name="T1">Polyvalence des formats</text:span> : Le dossier est un écosystème. Il accepte :</text:p>
          <text:list>
            <text:list-item>
              <text:p text:style-name="P8"><text:span text:style-name="T1">PDF</text:span> : Nommés selon le dictionnaire des instruments pour la substitution automatique.</text:p>
            </text:list-item>
            <text:list-item>
              <text:p text:style-name="P8"><text:span text:style-name="T1">MP3/WAV</text:span> : Fichiers audio de référence ou backing tracks.</text:p>
            </text:list-item>
            <text:list-item>
              <text:p text:style-name="P8"><text:span text:style-name="T1">JPG/PNG</text:span> : Captures de grilles d'accords ou annotations.</text:p>
            </text:list-item>
          </text:list>
        </text:list-item>
        <text:list-item>
          <text:p text:style-name="P8"><text:span text:style-name="T1">Nommage CamelCase</text:span> : Les dossiers (Étagères et Livres) utilisent le CamelCase (ex: <text:span text:style-name="Source_20_Text">MaSuperEtagere</text:span>). Cela permet au script de retrouver un nom lisible sans avoir besoin de gérer les accents complexes du système de fichiers Linux/Windows.</text:p>
        </text:list-item>
      </text:list>
      <text:h text:style-name="Heading_20_3" text:outline-level="3"><text:soft-page-break/>4. Récursivité</text:h>
      <text:p text:style-name="Text_20_body">Le système est capable de descendre dans l'arborescence. Une étagère peut être une sous-étagère d'une autre, permettant une classification par genre, puis par année, puis par livre : <text:span text:style-name="Source_20_Text">database/bands/Jazz/Swing/Annees40/GlennMiller/InTheMood/</text:span></text:p>
      <text:h text:style-name="Heading_20_2" text:outline-level="2">1. État des Lieux : Structure Musician Assistant (MA)</text:h>
      <text:p text:style-name="Text_20_body">Le format MA repose sur une <text:span text:style-name="T1">organisation par types de médias</text:span>, où les fichiers sont éclatés dans des dossiers spécialisés. L'identité des morceaux est pilotée par un fichier d'index.</text:p>
      <text:h text:style-name="Heading_20_3" text:outline-level="3">L'Arborescence MA</text:h>
      <text:list text:style-name="L3">
        <text:list-item>
          <text:p text:style-name="P9"><text:span text:style-name="Source_20_Text"><text:span text:style-name="T1">tracklist.txt</text:span></text:span> : Pivot du livre. Définit l'ordre et le nommage UTF-8 des morceaux.</text:p>
        </text:list-item>
        <text:list-item>
          <text:p text:style-name="P9"><text:span text:style-name="Source_20_Text"><text:span text:style-name="T1">score/</text:span></text:span> : Dossier des partitions, sous-divisé par <text:span text:style-name="T1">instruments</text:span> (<text:span text:style-name="Source_20_Text">DO/</text:span>, <text:span text:style-name="Source_20_Text">SIb/</text:span>, <text:span text:style-name="Source_20_Text">basse/</text:span>...).</text:p>
          <text:list>
            <text:list-item>
              <text:p text:style-name="P9">Les morceaux longs sont segmentés en plusieurs fichiers (ex: <text:span text:style-name="Source_20_Text">titre.pdf</text:span>, <text:span text:style-name="Source_20_Text">titre02.pdf</text:span>, <text:span text:style-name="Source_20_Text">titre03.pdf</text:span>).</text:p>
            </text:list-item>
          </text:list>
        </text:list-item>
        <text:list-item>
          <text:p text:style-name="P9"><text:span text:style-name="Source_20_Text"><text:span text:style-name="T1">mp3/</text:span></text:span> : Dossier des fichiers audio, sous-divisé par <text:span text:style-name="T1">usage</text:span> (<text:span text:style-name="Source_20_Text">backtrack/</text:span>, <text:span text:style-name="Source_20_Text">melody/</text:span>, <text:span text:style-name="Source_20_Text">slow/</text:span>...).</text:p>
        </text:list-item>
        <text:list-item>
          <text:p text:style-name="P9"><text:span text:style-name="T1">Fichiers</text:span> : Les noms sur le disque sont "sluggifiés" (souvent en CamelCase) pour éviter les conflits système, tandis que l'affichage utilise le nom propre stocké dans l'index.</text:p>
        </text:list-item>
      </text:list>
      <text:p text:style-name="Horizontal_20_Line"/>
      <text:h text:style-name="Heading_20_2" text:outline-level="2">2. L'Algorithme de Migration (MA ➔ BNS)</text:h>
      <text:p text:style-name="Text_20_body">L'objectif est de passer d'une structure <text:span text:style-name="T1">orientée média</text:span> à une structure <text:span text:style-name="T1">orientée objet</text:span> (un dossier auto-suffisant par morceau).</text:p>
      <text:h text:style-name="Heading_20_3" text:outline-level="3">Étape 1 : Analyse et Nettoyage de l'Index</text:h>
      <text:p text:style-name="Text_20_body">Le script lit <text:span text:style-name="Source_20_Text">tracklist.txt</text:span> et applique les filtres suivants :</text:p>
      <text:list text:style-name="L4">
        <text:list-item>
          <text:p text:style-name="P10"><text:span text:style-name="T1">Saut de la ligne 1</text:span> (ligne de métadonnées <text:span text:style-name="Source_20_Text"># -*- coding...</text:span>).</text:p>
        </text:list-item>
        <text:list-item>
          <text:p text:style-name="P10"><text:span text:style-name="T1">Ignorer</text:span> les lignes vides et les commentaires commençant par <text:span text:style-name="Source_20_Text">;</text:span>.</text:p>
        </text:list-item>
        <text:list-item>
          <text:p text:style-name="P10"><text:span text:style-name="T1">Nettoyage des Tags</text:span> : Pour chaque ligne, extraire le <text:span text:style-name="Source_20_Text">titre_propre</text:span> en supprimant tout ce qui suit le caractère <text:span text:style-name="Source_20_Text">#</text:span>.</text:p>
        </text:list-item>
        <text:list-item>
          <text:p text:style-name="P10"><text:span text:style-name="T1">Normalisation</text:span> : Générer une version <text:span text:style-name="Source_20_Text">nom_recherche</text:span> (CamelCase/PascalCase) pour faire correspondre le titre aux fichiers physiques.</text:p>
        </text:list-item>
      </text:list>
      <text:h text:style-name="Heading_20_3" text:outline-level="3">Étape 2 : Création de l'Enveloppe BNS</text:h>
      <text:p text:style-name="Text_20_body">Pour chaque morceau identifié :</text:p>
      <text:list text:style-name="L5">
        <text:list-item>
          <text:p text:style-name="P11"><text:span text:style-name="T1">Dossier Morceau</text:span> : Création d'un dossier en <text:span text:style-name="T1">PascalCase</text:span> (ex: <text:span text:style-name="Source_20_Text">AutumnLeaves</text:span>).</text:p>
        </text:list-item>
        <text:list-item>
          <text:p text:style-name="P11"><text:soft-page-break/><text:span text:style-name="T1">Identité</text:span> : Création du fichier <text:span text:style-name="Source_20_Text"><text:span text:style-name="T1">trackname.txt</text:span></text:span> contenant le <text:span text:style-name="Source_20_Text">titre_propre</text:span> en UTF-8 (ex: <text:span text:style-name="Source_20_Text">Autumn Leaves</text:span>).</text:p>
        </text:list-item>
      </text:list>
      <text:h text:style-name="Heading_20_3" text:outline-level="3">Étape 3 : Consolidation des Partitions (Fusion PDF)</text:h>
      <text:p text:style-name="Text_20_body">Le moteur de migration parcourt chaque sous-dossier de <text:span text:style-name="Source_20_Text">score/</text:span> :</text:p>
      <text:list text:style-name="L6">
        <text:list-item>
          <text:p text:style-name="P12"><text:span text:style-name="T1">Collecte</text:span> : Récupération de tous les fichiers commençant par le nom du morceau (ex: <text:span text:style-name="Source_20_Text">titre*.pdf</text:span>).</text:p>
        </text:list-item>
        <text:list-item>
          <text:p text:style-name="P12"><text:span text:style-name="T1">Tri</text:span> : Classement alphanumérique pour respecter l'ordre des pages (<text:span text:style-name="Source_20_Text">titre.pdf</text:span> &lt; <text:span text:style-name="Source_20_Text">titre02.pdf</text:span>).</text:p>
        </text:list-item>
        <text:list-item>
          <text:p text:style-name="P12"><text:span text:style-name="T1">Fusion</text:span> : Concaténation des pages en un <text:span text:style-name="T1">unique fichier PDF</text:span> nommé selon l'instrument (ex: <text:span text:style-name="Source_20_Text">SIb.pdf</text:span>).</text:p>
        </text:list-item>
        <text:list-item>
          <text:p text:style-name="P12"><text:span text:style-name="T1">Destination</text:span> : Placement du PDF final dans le dossier du morceau BNS.</text:p>
        </text:list-item>
      </text:list>
      <text:h text:style-name="Heading_20_3" text:outline-level="3">Étape 4 : Regroupement des Médias Audio</text:h>
      <text:p text:style-name="Text_20_body">Le script parcourt les sous-dossiers de <text:span text:style-name="Source_20_Text">mp3/</text:span> :</text:p>
      <text:list text:style-name="L7">
        <text:list-item>
          <text:p text:style-name="P13"><text:span text:style-name="T1">Identification</text:span> : Recherche du fichier correspondant au nom du morceau (ex: <text:span text:style-name="Source_20_Text">titre.mp3</text:span>).</text:p>
        </text:list-item>
        <text:list-item>
          <text:p text:style-name="P13"><text:span text:style-name="T1">Relocalisation</text:span> : Le fichier est déplacé/copié à la racine du dossier morceau BNS.</text:p>
        </text:list-item>
        <text:list-item>
          <text:p text:style-name="P13"><text:span text:style-name="T1">Renommage contextuel</text:span> : Le fichier prend le nom de son dossier d'origine (ex: <text:span text:style-name="Source_20_Text">backtrack.mp3</text:span>, <text:span text:style-name="Source_20_Text">melody.mp3</text:span>) pour conserver sa fonction.</text:p>
        </text:list-item>
      </text:list>
      <text:p text:style-name="Horizontal_20_Line"/>
      <text:h text:style-name="Heading_20_2" text:outline-level="2">3. Résultat Final (BNS)</text:h>
      <text:p text:style-name="Text_20_body">Après migration, le livre est devenu une <text:span text:style-name="T1">Étagère PascalCase</text:span> contenant des <text:span text:style-name="T1">Dossiers Morceaux autonomes</text:span>. Chaque dossier de morceau est prêt à être scanné par l'interface BNS, avec ses partitions fusionnées et ses playbacks immédiatement disponibles.</text:p>
      <text:p text:style-name="Quotations"><text:span text:style-name="T1">Note technique</text:span> : La fusion des PDF garantit qu'une partition multipage ne génère qu'une seule entrée dans le visualiseur de partitions, simplifiant la navigation lors de l'exécution.</text:p>
      <text:p text:style-name="Standard"/>
      <text:h text:style-name="P3" text:outline-level="2">📄 Documentation : Analyse et Validation des Instruments</text:h>
      <text:p text:style-name="Text_20_body">Le système utilise une logique de <text:span text:style-name="T1">filtrage par couches</text:span> pour réconcilier les noms de fichiers physiques (souvent riches en détails) avec les définitions d'instruments abstraites dans <text:span text:style-name="Source_20_Text">instruments.py</text:span>.</text:p>
      <text:h text:style-name="Heading_20_3" text:outline-level="3">🛠 1. Anatomie d'un nom de fichier PDF</text:h>
      <text:p text:style-name="Text_20_body">Chaque fichier dans un dossier <text:span text:style-name="Source_20_Text">track</text:span> suit une convention de nommage stricte, composée d'une racine et de modificateurs optionnels.</text:p>
      <text:p text:style-name="Text_20_body"><text:span text:style-name="T1">Structure :</text:span> <text:span text:style-name="Source_20_Text">[Prefixe] + [Racine] + [Voix] + [Suffixe] + .pdf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Composant</text:p>
            </table:table-cell>
            <table:table-cell table:style-name="Tableau1.A1" office:value-type="string">
              <text:p text:style-name="Table_20_Heading">Rôle</text:p>
            </table:table-cell>
            <table:table-cell table:style-name="Tableau1.A1" office:value-type="string">
              <text:p text:style-name="Table_20_Heading">Valeurs détectées</text:p>
            </table:table-cell>
            <table:table-cell table:style-name="Tableau1.A1" office:value-type="string">
              <text:p text:style-name="Table_20_Heading">Impact sur la racine</text:p>
            </table:table-cell>
          </table:table-row>
        </table:table-header-rows>
        <table:table-row>
          <table:table-cell table:style-name="Tableau1.A1" office:value-type="string">
            <text:p text:style-name="P4">Prefixe</text:p>
          </table:table-cell>
          <table:table-cell table:style-name="Tableau1.A1" office:value-type="string">
            <text:p text:style-name="Table_20_Contents">Niveau de difficulté</text:p>
          </table:table-cell>
          <table:table-cell table:style-name="Tableau1.A1" office:value-type="string">
            <text:p text:style-name="Table_20_Contents"><text:span text:style-name="Source_20_Text">easy</text:span></text:p>
          </table:table-cell>
          <table:table-cell table:style-name="Tableau1.A1" office:value-type="string">
            <text:p text:style-name="Table_20_Contents">Retiré par <text:span text:style-name="Source_20_Text">getFirstVoice</text:span></text:p>
          </table:table-cell>
        </table:table-row>
        <table:table-row>
          <table:table-cell table:style-name="Tableau1.A1" office:value-type="string">
            <text:p text:style-name="P4">Racine</text:p>
          </table:table-cell>
          <table:table-cell table:style-name="Tableau1.A1" office:value-type="string">
            <text:p text:style-name="Table_20_Contents">Identifiant unique</text:p>
          </table:table-cell>
          <table:table-cell table:style-name="Tableau1.A1" office:value-type="string">
            <text:p text:style-name="P5">ex: trompette, sax_alto</text:p>
          </table:table-cell>
          <table:table-cell table:style-name="Tableau1.A1" office:value-type="string">
            <text:p text:style-name="Table_20_Contents"><text:span text:style-name="T1">Conservé</text:span> (clé de recherche)</text:p>
          </table:table-cell>
        </table:table-row>
        <table:table-row>
          <table:table-cell table:style-name="Tableau1.A1" office:value-type="string">
            <text:p text:style-name="P4">Voix</text:p>
          </table:table-cell>
          <table:table-cell table:style-name="Tableau1.A1" office:value-type="string">
            <text:p text:style-name="Table_20_Contents">Numéro de pupitre</text:p>
          </table:table-cell>
          <table:table-cell table:style-name="Tableau1.A1" office:value-type="string">
            <text:p text:style-name="Table_20_Contents"><text:span text:style-name="Source_20_Text">2</text:span>, <text:span text:style-name="Source_20_Text">3</text:span>, <text:span text:style-name="Source_20_Text">4</text:span></text:p>
          </table:table-cell>
          <table:table-cell table:style-name="Tableau1.A1" office:value-type="string">
            <text:p text:style-name="Table_20_Contents">Retiré par <text:span text:style-name="Source_20_Text">getFirstVoice</text:span></text:p>
          </table:table-cell>
        </table:table-row>
        <table:table-row>
          <table:table-cell table:style-name="Tableau1.A1" office:value-type="string">
            <text:p text:style-name="P4">Suffixe</text:p>
          </table:table-cell>
          <table:table-cell table:style-name="Tableau1.A1" office:value-type="string">
            <text:p text:style-name="Table_20_Contents">Statut particulier</text:p>
          </table:table-cell>
          <table:table-cell table:style-name="Tableau1.A1" office:value-type="string">
            <text:p text:style-name="Table_20_Contents"><text:span text:style-name="Source_20_Text">solo</text:span></text:p>
          </table:table-cell>
          <table:table-cell table:style-name="Tableau1.A1" office:value-type="string">
            <text:p text:style-name="Table_20_Contents">Retiré par <text:span text:style-name="Source_20_Text">getFirstVoice</text:span></text:p>
          </table:table-cell>
        </table:table-row>
      </table:table>
      <text:p text:style-name="P6">Exporter vers Sheets</text:p>
      <text:p text:style-name="Horizontal_20_Line"/>
      <text:h text:style-name="Heading_20_3" text:outline-level="3">🧬 2. Le pipeline de traitement (Factorisation DRY)</text:h>
      <text:p text:style-name="Text_20_body">Pour valider un fichier, le script <text:span text:style-name="Source_20_Text">updateDatabase.py</text:span> délègue l'analyse au script <text:span text:style-name="Source_20_Text">scripts/instruments.py</text:span> via deux fonctions clés :</text:p>
      <text:list text:style-name="L8">
        <text:list-item>
          <text:p text:style-name="P14"><text:span text:style-name="Source_20_Text"><text:span text:style-name="T1">getFirstVoice(name)</text:span></text:span> :</text:p>
          <text:list>
            <text:list-item>
              <text:p text:style-name="P14">Applique les filtres de nettoyage (retrait des préfixes et suffixes).</text:p>
            </text:list-item>
            <text:list-item>
              <text:p text:style-name="P14">Garantit que <text:span text:style-name="Source_20_Text">easytrompette2solo</text:span> et <text:span text:style-name="Source_20_Text">trompette</text:span> pointent vers la même racine : <text:span text:style-name="Source_20_Text">trompette</text:span>.</text:p>
            </text:list-item>
          </text:list>
        </text:list-item>
        <text:list-item>
          <text:p text:style-name="P14"><text:span text:style-name="Source_20_Text"><text:span text:style-name="T1">isKnownInstrument(root)</text:span></text:span> :</text:p>
          <text:list>
            <text:list-item>
              <text:p text:style-name="P14">Vérifie si la racine nettoyée existe dans <text:span text:style-name="Source_20_Text">INSTRUMENTS</text:span> (instruments réels) ou <text:span text:style-name="Source_20_Text">VIRTUAL_INSTRUMENTS</text:span> (tonalités).</text:p>
            </text:list-item>
          </text:list>
        </text:list-item>
      </text:list>
      <text:p text:style-name="Horizontal_20_Line"/>
      <text:h text:style-name="Heading_20_3" text:outline-level="3">🔍 3. Parallèle entre Fichiers et Database</text:h>
      <text:p text:style-name="Text_20_body">Voici comment le scanner interprète les fichiers trouvés dans la database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Table_20_Heading">Fichier PDF trouvé</text:p>
            </table:table-cell>
            <table:table-cell table:style-name="Tableau2.A1" office:value-type="string">
              <text:p text:style-name="Table_20_Heading">Racine extraite (<text:span text:style-name="Source_20_Text">getFirstVoice</text:span>)</text:p>
            </table:table-cell>
            <table:table-cell table:style-name="Tableau2.A1" office:value-type="string">
              <text:p text:style-name="Table_20_Heading">Match Database (<text:span text:style-name="Source_20_Text">isKnownInstrument</text:span>)</text:p>
            </table:table-cell>
            <table:table-cell table:style-name="Tableau2.A1" office:value-type="string">
              <text:p text:style-name="Table_20_Heading">État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ource_20_Text">flute.pdf</text:span></text:p>
          </table:table-cell>
          <table:table-cell table:style-name="Tableau2.A1" office:value-type="string">
            <text:p text:style-name="Table_20_Contents"><text:span text:style-name="Source_20_Text">flute</text:span></text:p>
          </table:table-cell>
          <table:table-cell table:style-name="Tableau2.A1" office:value-type="string">
            <text:p text:style-name="Table_20_Contents"><text:span text:style-name="Source_20_Text">INSTRUMENTS["flute"]</text:span></text:p>
          </table:table-cell>
          <table:table-cell table:style-name="Tableau2.A1" office:value-type="string">
            <text:p text:style-name="Table_20_Contents">✅ OK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easyclarinette2.pdf</text:span></text:p>
          </table:table-cell>
          <table:table-cell table:style-name="Tableau2.A1" office:value-type="string">
            <text:p text:style-name="Table_20_Contents"><text:span text:style-name="Source_20_Text">clarinette</text:span></text:p>
          </table:table-cell>
          <table:table-cell table:style-name="Tableau2.A1" office:value-type="string">
            <text:p text:style-name="Table_20_Contents"><text:span text:style-name="Source_20_Text">INSTRUMENTS["clarinette"]</text:span></text:p>
          </table:table-cell>
          <table:table-cell table:style-name="Tableau2.A1" office:value-type="string">
            <text:p text:style-name="Table_20_Contents">✅ OK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MIb.pdf</text:span></text:p>
          </table:table-cell>
          <table:table-cell table:style-name="Tableau2.A1" office:value-type="string">
            <text:p text:style-name="Table_20_Contents"><text:span text:style-name="Source_20_Text">MIb</text:span></text:p>
          </table:table-cell>
          <table:table-cell table:style-name="Tableau2.A1" office:value-type="string">
            <text:p text:style-name="Table_20_Contents"><text:span text:style-name="Source_20_Text">VIRTUAL_INSTRUMENTS["MIb"]</text:span></text:p>
          </table:table-cell>
          <table:table-cell table:style-name="Tableau2.A1" office:value-type="string">
            <text:p text:style-name="Table_20_Contents">✅ OK</text:p>
          </table:table-cell>
        </table:table-row>
        <text:soft-page-break/>
        <table:table-row>
          <table:table-cell table:style-name="Tableau2.A1" office:value-type="string">
            <text:p text:style-name="Table_20_Contents"><text:span text:style-name="Source_20_Text">sax_altosolo.pdf</text:span></text:p>
          </table:table-cell>
          <table:table-cell table:style-name="Tableau2.A1" office:value-type="string">
            <text:p text:style-name="Table_20_Contents"><text:span text:style-name="Source_20_Text">sax_alto</text:span></text:p>
          </table:table-cell>
          <table:table-cell table:style-name="Tableau2.A1" office:value-type="string">
            <text:p text:style-name="Table_20_Contents"><text:span text:style-name="Source_20_Text">INSTRUMENTS["sax_alto"]</text:span></text:p>
          </table:table-cell>
          <table:table-cell table:style-name="Tableau2.A1" office:value-type="string">
            <text:p text:style-name="Table_20_Contents">✅ OK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easytrombone3solo.pdf</text:span></text:p>
          </table:table-cell>
          <table:table-cell table:style-name="Tableau2.A1" office:value-type="string">
            <text:p text:style-name="Table_20_Contents"><text:span text:style-name="Source_20_Text">trombone</text:span></text:p>
          </table:table-cell>
          <table:table-cell table:style-name="Tableau2.A1" office:value-type="string">
            <text:p text:style-name="Table_20_Contents"><text:span text:style-name="Source_20_Text">INSTRUMENTS["trombone"]</text:span></text:p>
          </table:table-cell>
          <table:table-cell table:style-name="Tableau2.A1" office:value-type="string">
            <text:p text:style-name="Table_20_Contents">✅ OK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trumpetsolo.pdf</text:span></text:p>
          </table:table-cell>
          <table:table-cell table:style-name="Tableau2.A1" office:value-type="string">
            <text:p text:style-name="Table_20_Contents"><text:span text:style-name="Source_20_Text">trumpet</text:span></text:p>
          </table:table-cell>
          <table:table-cell table:style-name="Tableau2.A1" office:value-type="string">
            <text:p text:style-name="Table_20_Contents"><text:span text:style-name="T2">Non trouvé</text:span> (si <text:span text:style-name="Source_20_Text">trompette</text:span>)</text:p>
          </table:table-cell>
          <table:table-cell table:style-name="Tableau2.A1" office:value-type="string">
            <text:p text:style-name="Table_20_Contents">❌ <text:span text:style-name="T1">ERROR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6:49:01.487847482</meta:creation-date>
    <dc:date>2026-04-25T15:27:16.470361257</dc:date>
    <meta:editing-duration>PT5H14M50S</meta:editing-duration>
    <meta:editing-cycles>4</meta:editing-cycles>
    <meta:generator>LibreOffice/24.2.7.2$Linux_X86_64 LibreOffice_project/420$Build-2</meta:generator>
    <meta:document-statistic meta:table-count="2" meta:image-count="0" meta:object-count="0" meta:page-count="5" meta:paragraph-count="129" meta:word-count="1045" meta:character-count="7157" meta:non-whitespace-character-count="6053"/>
  </office:meta>
</office:document-meta>
</file>