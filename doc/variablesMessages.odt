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8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ici un résumé structuré des échanges de données pour ton projet <text:span text:style-name="T1">Back'n Score</text:span>. Cette structure permet de gérer l'orchestre en temps réel sur ton réseau local Ubuntu.</text:p>
      <text:section text:style-name="Sect1" text:name="model-response-message-contentr_221e9797c7b81827">
        <text:p text:style-name="Horizontal_20_Line"/>
        <text:h text:style-name="Heading_20_3" text:outline-level="3">1. Le Registre des Musiciens (Côté Serveur)</text:h>
        <text:p text:style-name="Text_20_body">Le serveur Python maintient en mémoire (et idéalement dans un fichier <text:span text:style-name="Source_20_Text">.json</text:span> ou <text:span text:style-name="Source_20_Text">.txt</text:span> pour la persistance) un dictionnaire des appareils connectés.</text:p>
        <text:p text:style-name="P3">Structure d'un profil musicien :</text:p>
        <text:list text:style-name="L1">
          <text:list-item>
            <text:p text:style-name="P5"><text:span text:style-name="T1">ID Unique :</text:span> Généré par le navigateur et stocké dans le <text:span text:style-name="Source_20_Text">LocalStorage</text:span> (ex: <text:span text:style-name="Source_20_Text">uuid-78910</text:span>).</text:p>
          </text:list-item>
          <text:list-item>
            <text:p text:style-name="P5"><text:span text:style-name="T1">Instrument :</text:span> Choisi via le <text:span text:style-name="Source_20_Text">tree</text:span> par le musicien (ex: <text:span text:style-name="Source_20_Text">Violon_2</text:span>).</text:p>
          </text:list-item>
          <text:list-item>
            <text:p text:style-name="P5"><text:span text:style-name="T1">Capacité (Type) :</text:span> Déterminée par la tablette (<text:span text:style-name="Source_20_Text">PDF</text:span> pour les modernes, <text:span text:style-name="Source_20_Text">IMAGES</text:span> pour les Android 4).</text:p>
          </text:list-item>
          <text:list-item>
            <text:p text:style-name="P5"><text:span text:style-name="T1">IP :</text:span> Adresse locale pour le routage (ex: <text:span text:style-name="Source_20_Text">192.168.1.15</text:span>).</text:p>
          </text:list-item>
          <text:list-item>
            <text:p text:style-name="P5"><text:span text:style-name="T1">Dernier rafraîchissement :</text:span> Horodatage du dernier signal de vie (Heartbeat).</text:p>
          </text:list-item>
        </text:list>
        <text:p text:style-name="Horizontal_20_Line"/>
        <text:h text:style-name="Heading_20_3" text:outline-level="3">2. L'État de la Session (Global)</text:h>
        <text:p text:style-name="Text_20_body">Une variable unique qui définit ce que tout l'orchestre doit jouer.</text:p>
        <text:list text:style-name="L2">
          <text:list-item>
            <text:p text:style-name="P6"><text:span text:style-name="T1">Chemin du Morceau :</text:span> Le dossier actuel sélectionné par le Chef (ex: <text:span text:style-name="Source_20_Text">/partitions/jazz/blue_train/</text:span>).</text:p>
          </text:list-item>
          <text:list-item>
            <text:p text:style-name="P6"><text:span text:style-name="T1">Version / Timestamp :</text:span> Permet aux musiciens de savoir si le morceau a changé depuis leur dernier chargement.</text:p>
          </text:list-item>
        </text:list>
        <text:p text:style-name="Horizontal_20_Line"/>
        <text:h text:style-name="Heading_20_3" text:outline-level="3">3. Les Flux de Messages (JSON)</text:h>
        <text:h text:style-name="Heading_20_4" text:outline-level="4">A. Le "Check-in" du Musicien (Tablette → Serveur)</text:h>
        <text:p text:style-name="Text_20_body">Envoyé au chargement de la page ou lors d'un changement d'instrument.</text:p>
        <text:p text:style-name="P2">JSON</text:p>
        <text:p text:style-name="Preformatted_20_Text"><text:span text:style-name="Source_20_Text">{</text:span></text:p>
        <text:p text:style-name="Preformatted_20_Text"><text:span text:style-name="Source_20_Text"><text:s text:c="2"/>"action": "REGISTER",</text:span></text:p>
        <text:p text:style-name="Preformatted_20_Text"><text:span text:style-name="Source_20_Text"><text:s text:c="2"/>"device_id": "uuid-78910",</text:span></text:p>
        <text:p text:style-name="Preformatted_20_Text"><text:span text:style-name="Source_20_Text"><text:s text:c="2"/>"instrument": "Clarinette_1",</text:span></text:p>
        <text:p text:style-name="Preformatted_20_Text"><text:span text:style-name="Source_20_Text"><text:s text:c="2"/>"format": "IMAGES"</text:span></text:p>
        <text:p text:style-name="P1"><text:span text:style-name="Source_20_Text">}</text:span></text:p>
        <text:h text:style-name="Heading_20_4" text:outline-level="4">B. La Sélection du Chef (Chef → Serveur)</text:h>
        <text:p text:style-name="Text_20_body">Envoyé quand le chef choisit un nouveau morceau dans son arborescence.</text:p>
        <text:p text:style-name="P2">JSON</text:p>
        <text:p text:style-name="Preformatted_20_Text"><text:soft-page-break/><text:span text:style-name="Source_20_Text">{</text:span></text:p>
        <text:p text:style-name="Preformatted_20_Text"><text:span text:style-name="Source_20_Text"><text:s text:c="2"/>"action": "SET_TRACK",</text:span></text:p>
        <text:p text:style-name="Preformatted_20_Text"><text:span text:style-name="Source_20_Text"><text:s text:c="2"/>"track_path": "classique/mozart_40",</text:span></text:p>
        <text:p text:style-name="Preformatted_20_Text"><text:span text:style-name="Source_20_Text"><text:s text:c="2"/>"track_name": "Symphonie n°40"</text:span></text:p>
        <text:p text:style-name="P1"><text:span text:style-name="Source_20_Text">}</text:span></text:p>
        <text:h text:style-name="Heading_20_4" text:outline-level="4">C. La Réponse de Synchronisation (Serveur → Musicien)</text:h>
        <text:p text:style-name="Text_20_body">Envoyé suite à une requête du musicien ou un rafraîchissement (F5).</text:p>
        <text:list text:style-name="L3">
          <text:list-item>
            <text:p text:style-name="P7"><text:span text:style-name="T1">Si Moderne :</text:span> Renvoie l'URL du fichier PDF complet.</text:p>
          </text:list-item>
          <text:list-item>
            <text:p text:style-name="P7"><text:span text:style-name="T1">Si Ancien :</text:span> Renvoie une liste d'URLs vers les images générées à la volée (ou une page HTML les contenant).</text:p>
          </text:list-item>
        </text:list>
        <text:p text:style-name="P2">JSON</text:p>
        <text:p text:style-name="Preformatted_20_Text"><text:span text:style-name="Source_20_Text">{</text:span></text:p>
        <text:p text:style-name="Preformatted_20_Text"><text:span text:style-name="Source_20_Text"><text:s text:c="2"/>"status": "SYNC",</text:span></text:p>
        <text:p text:style-name="Preformatted_20_Text"><text:span text:style-name="Source_20_Text"><text:s text:c="2"/>"current_track": "Symphonie n°40",</text:span></text:p>
        <text:p text:style-name="Preformatted_20_Text"><text:span text:style-name="Source_20_Text"><text:s text:c="2"/>"file_url": "/data/classique/mozart_40/clarinette_1.pdf",</text:span></text:p>
        <text:p text:style-name="Preformatted_20_Text"><text:span text:style-name="Source_20_Text"><text:s text:c="2"/>"format": "PDF"</text:span></text:p>
        <text:p text:style-name="P1"><text:span text:style-name="Source_20_Text">}</text:span></text:p>
        <text:p text:style-name="Horizontal_20_Line"/>
        <text:h text:style-name="Heading_20_3" text:outline-level="3">4. Logique de Stockage Locale (Navigateur)</text:h>
        <text:p text:style-name="Text_20_body">Le <text:span text:style-name="Source_20_Text">LocalStorage</text:span> sur les tablettes des musiciens stocke uniquement :</text:p>
        <text:list text:style-name="L4">
          <text:list-item>
            <text:p text:style-name="P8"><text:span text:style-name="Source_20_Text"><text:span text:style-name="T1">my_id</text:span></text:span><text:span text:style-name="T1"> :</text:span> L'identifiant permanent de la tablette.</text:p>
          </text:list-item>
          <text:list-item>
            <text:p text:style-name="P8"><text:span text:style-name="Source_20_Text"><text:span text:style-name="T1">my_instrument</text:span></text:span><text:span text:style-name="T1"> :</text:span> Le dernier instrument sélectionné.</text:p>
          </text:list-item>
          <text:list-item>
            <text:p text:style-name="P8"><text:span text:style-name="Source_20_Text"><text:span text:style-name="T1">my_format</text:span></text:span><text:span text:style-name="T1"> :</text:span> PDF ou IMAGE (déterminé une fois pour toutes).</text:p>
          </text:list-item>
        </text:list>
        <text:p text:style-name="Horizontal_20_Line"/>
        <text:h text:style-name="Heading_20_3" text:outline-level="3">5. Synthèse du fonctionnement "F5"</text:h>
        <text:list text:style-name="L5">
          <text:list-item>
            <text:p text:style-name="P9"><text:span text:style-name="T1">Action :</text:span> Le musicien rafraîchit la page.</text:p>
          </text:list-item>
          <text:list-item>
            <text:p text:style-name="P9"><text:span text:style-name="T1">Lecture :</text:span> Le JS lit <text:span text:style-name="Source_20_Text">my_id</text:span> et <text:span text:style-name="Source_20_Text">my_instrument</text:span> dans le <text:span text:style-name="Source_20_Text">LocalStorage</text:span>.</text:p>
          </text:list-item>
          <text:list-item>
            <text:p text:style-name="P9"><text:span text:style-name="T1">Appel :</text:span> Le JS envoie un message <text:span text:style-name="Source_20_Text">REGISTER</text:span> au serveur.</text:p>
          </text:list-item>
          <text:list-item>
            <text:p text:style-name="P9"><text:span text:style-name="T1">Réponse :</text:span> Le serveur identifie le musicien, regarde le morceau en cours défini par le chef, et renvoie le <text:span text:style-name="Source_20_Text">file_url</text:span> approprié.</text:p>
          </text:list-item>
          <text:list-item>
            <text:p text:style-name="P9"><text:span text:style-name="T1">Affichage :</text:span> La tablette télécharge le fichier complet et le musicien est à nouveau opérationnel, sans aucune saisie manuelle.</text:p>
          </text:list-item>
        </text:list>
        <text:p text:style-name="Text_20_body">Cette structure est légère, ne surcharge pas ton réseau local, et garantit que même si un appareil redémarre, il reprend sa place exacte dans l'orchestre en quelques secondes.</text:p>
      </text:section>
      <text:p text:style-name="Text_20_body">Puisque nous sommes sur <text:span text:style-name="T1">Ubuntu</text:span> avec un serveur <text:span text:style-name="T1">Python</text:span>, on va rester sur du robuste et du léger. On ne va pas utiliser de grosses bases de données lourdes, mais simplement des dictionnaires Python et des fichiers JSON.</text:p>
      <text:p text:style-name="Text_20_body"><text:soft-page-break/>Voici la stratégie de codage étape par étape pour construire ce "cerveau" d'orchestre.</text:p>
      <text:p text:style-name="Horizontal_20_Line"/>
      <text:h text:style-name="Heading_20_3" text:outline-level="3">1. La structure de fichiers (Le socle)</text:h>
      <text:p text:style-name="Text_20_body">Avant de coder, organise tes dossiers sur ton Ubuntu. C'est ce qui permettra à Python de "deviner" où sont les partitions.</text:p>
      <text:p text:style-name="P2">Plaintext</text:p>
      <text:p text:style-name="Preformatted_20_Text"><text:span text:style-name="Source_20_Text">BackNScore/</text:span></text:p>
      <text:p text:style-name="Preformatted_20_Text"><text:span text:style-name="Source_20_Text">├── serveur.py <text:s text:c="9"/># Ton script principal</text:span></text:p>
      <text:p text:style-name="Preformatted_20_Text"><text:span text:style-name="Source_20_Text">├── registre.json <text:s text:c="6"/># Stockage des musiciens (ID, Instrument, Type)</text:span></text:p>
      <text:p text:style-name="Preformatted_20_Text"><text:span text:style-name="Source_20_Text">├── session.json <text:s text:c="7"/># Stockage du morceau choisi par le chef</text:span></text:p>
      <text:p text:style-name="Preformatted_20_Text"><text:span text:style-name="Source_20_Text">├── partitions/ <text:s text:c="8"/># Tes dossiers de PDF</text:span></text:p>
      <text:p text:style-name="P1"><text:span text:style-name="Source_20_Text">└── static/ <text:s text:c="12"/># Tes fichiers HTML/JS (Chef et Musiciens)</text:span></text:p>
      <text:h text:style-name="Heading_20_3" text:outline-level="3">2. Côté Serveur (Python) : Le gestionnaire d'état</text:h>
      <text:p text:style-name="Text_20_body">Tu vas utiliser la classe <text:span text:style-name="Source_20_Text">BaseHTTPRequestHandler</text:span>. Son rôle est de gérer deux grandes listes :</text:p>
      <text:list text:style-name="L6">
        <text:list-item>
          <text:p text:style-name="P10"><text:span text:style-name="T1">Le Registre :</text:span> Un dictionnaire Python chargé au démarrage depuis <text:span text:style-name="Source_20_Text">registre.json</text:span>.</text:p>
        </text:list-item>
        <text:list-item>
          <text:p text:style-name="P10"><text:span text:style-name="T1">La Session :</text:span> Une variable qui contient le chemin du dossier sélectionné par le chef.</text:p>
        </text:list-item>
      </text:list>
      <text:p text:style-name="P3">La logique du code :</text:p>
      <text:list text:style-name="L7">
        <text:list-item>
          <text:p text:style-name="P11"><text:span text:style-name="T1">Si POST </text:span><text:span text:style-name="Source_20_Text"><text:span text:style-name="T1">/register</text:span></text:span><text:span text:style-name="T1"> :</text:span> Le serveur reçoit l'ID, l'Instrument et le Type (PDF/Image). Il met à jour le dictionnaire et sauvegarde dans le fichier JSON.</text:p>
        </text:list-item>
        <text:list-item>
          <text:p text:style-name="P11"><text:span text:style-name="T1">Si POST </text:span><text:span text:style-name="Source_20_Text"><text:span text:style-name="T1">/set-track</text:span></text:span><text:span text:style-name="T1"> :</text:span> Le serveur reçoit le choix du chef et met à jour la session globale.</text:p>
        </text:list-item>
        <text:list-item>
          <text:p text:style-name="P11"><text:span text:style-name="T1">Si GET </text:span><text:span text:style-name="Source_20_Text"><text:span text:style-name="T1">/sync</text:span></text:span><text:span text:style-name="T1"> :</text:span> Le serveur regarde l'ID de celui qui demande, cherche son instrument, regarde le morceau en cours, et renvoie le bon lien de fichier.</text:p>
        </text:list-item>
      </text:list>
      <text:p text:style-name="Horizontal_20_Line"/>
      <text:h text:style-name="Heading_20_3" text:outline-level="3">3. Côté Musicien (JavaScript) : L'automatisme</text:h>
      <text:p text:style-name="Text_20_body">Le code sur la tablette doit être "intelligent" mais simple.</text:p>
      <text:list text:style-name="L8">
        <text:list-item>
          <text:p text:style-name="P4">Au chargement :</text:p>
          <text:list>
            <text:list-item>
              <text:p text:style-name="P12">Il check le <text:span text:style-name="Source_20_Text">localStorage</text:span> pour <text:span text:style-name="Source_20_Text">my_id</text:span> et <text:span text:style-name="Source_20_Text">my_instrument</text:span>.</text:p>
            </text:list-item>
            <text:list-item>
              <text:p text:style-name="P12">Si vide : il affiche la liste de sélection.</text:p>
            </text:list-item>
            <text:list-item>
              <text:p text:style-name="P12">Si plein : il envoie une requête de synchronisation au serveur.</text:p>
            </text:list-item>
          </text:list>
        </text:list-item>
        <text:list-item>
          <text:p text:style-name="P12"><text:span text:style-name="T1">La détection du type :</text:span> Un petit test simple : essayer de créer un objet PDF ou vérifier la version du navigateur (User-Agent). S'il détecte Android 4, il s'enregistre avec le tag <text:span text:style-name="Source_20_Text">"format": "image"</text:span>.</text:p>
        </text:list-item>
      </text:list>
      <text:p text:style-name="Horizontal_20_Line"/>
      <text:h text:style-name="Heading_20_3" text:outline-level="3"><text:soft-page-break/>4. La conversion "On-the-fly" (Le muscle d'Ubuntu)</text:h>
      <text:p text:style-name="Text_20_body">C'est la partie la plus technique mais la plus gratifiante. Dans ton script Python, tu vas importer une bibliothèque comme <text:span text:style-name="Source_20_Text">pdf2image</text:span>.</text:p>
      <text:list text:style-name="L9">
        <text:list-item>
          <text:p text:style-name="P13">Quand une vieille tablette demande une partition, Python vérifie si le dossier d'images existe déjà.</text:p>
        </text:list-item>
        <text:list-item>
          <text:p text:style-name="P13">Si le dossier est vide, Python exécute une commande interne pour transformer chaque page du PDF en <text:span text:style-name="Source_20_Text">.jpg</text:span> dans un dossier temporaire.</text:p>
        </text:list-item>
        <text:list-item>
          <text:p text:style-name="P13">Le serveur renvoie ensuite la liste de ces images à la tablette.</text:p>
        </text:list-item>
      </text:list>
      <text:p text:style-name="Horizontal_20_Line"/>
      <text:h text:style-name="Heading_20_3" text:outline-level="3">5. Le "Coup de sifflet" (Synchronisation)</text:h>
      <text:p text:style-name="Text_20_body">Pour que le F5 ne soit pas la seule solution, on peut utiliser les <text:span text:style-name="T1">Server-Sent Events (SSE)</text:span>. C'est une ligne de communication ouverte où le serveur peut envoyer un message court : <text:span text:style-name="Source_20_Text">"CHANGE_TRACK"</text:span>.</text:p>
      <text:list text:style-name="L10">
        <text:list-item>
          <text:p text:style-name="P14">Quand la tablette reçoit ce message, elle déclenche d'elle-même la procédure de mise à jour (comme un F5 invisible)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0:56:32.341262871</meta:creation-date>
    <dc:date>2026-04-18T12:50:53.385266311</dc:date>
    <meta:editing-duration>PT43M3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88" meta:word-count="927" meta:character-count="5647" meta:non-whitespace-character-count="4775"/>
  </office:meta>
</office:document-meta>
</file>