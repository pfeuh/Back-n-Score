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left"/>
    </style:style>
    <style:style style:name="Tableau1.A" style:family="table-column">
      <style:table-column-properties style:column-width="5.738cm"/>
    </style:style>
    <style:style style:name="Tableau1.B" style:family="table-column">
      <style:table-column-properties style:column-width="3.007cm"/>
    </style:style>
    <style:style style:name="Tableau1.C" style:family="table-column">
      <style:table-column-properties style:column-width="8.255cm"/>
    </style:style>
    <style:style style:name="Tableau1.A1" style:family="table-cell">
      <style:table-cell-properties style:vertical-align="middle" fo:padding="0.049cm" fo:border="none"/>
    </style:style>
    <style:style style:name="Tableau2" style:family="table">
      <style:table-properties style:width="17cm" table:align="left"/>
    </style:style>
    <style:style style:name="Tableau2.A" style:family="table-column">
      <style:table-column-properties style:column-width="2.708cm"/>
    </style:style>
    <style:style style:name="Tableau2.B" style:family="table-column">
      <style:table-column-properties style:column-width="2.044cm"/>
    </style:style>
    <style:style style:name="Tableau2.C" style:family="table-column">
      <style:table-column-properties style:column-width="12.248cm"/>
    </style:style>
    <style:style style:name="Tableau2.A1" style:family="table-cell">
      <style:table-cell-properties style:vertical-align="middle" fo:padding="0.049cm" fo:border="none"/>
    </style:style>
    <style:style style:name="P1" style:family="paragraph" style:parent-style-name="Heading_20_3">
      <style:paragraph-properties fo:break-before="page"/>
    </style:style>
    <style:style style:name="P2" style:family="paragraph" style:parent-style-name="Text_20_body">
      <style:paragraph-properties fo:break-before="page"/>
    </style:style>
    <style:style style:name="P3" style:family="paragraph" style:parent-style-name="Heading_20_2">
      <style:paragraph-properties fo:break-before="page"/>
    </style:style>
    <style:style style:name="P4" style:family="paragraph" style:parent-style-name="Text_20_body">
      <style:text-properties fo:font-style="italic"/>
    </style:style>
    <style:style style:name="P5" style:family="paragraph" style:parent-style-name="Heading_20_3">
      <style:paragraph-properties fo:margin-left="0cm" fo:margin-right="0cm" fo:text-indent="0cm" style:auto-text-indent="false" fo:break-before="page"/>
    </style:style>
    <style:style style:name="P6" style:family="paragraph" style:parent-style-name="Text_20_body">
      <style:paragraph-properties fo:margin-left="0cm" fo:margin-right="0cm" fo:text-indent="0cm" style:auto-text-indent="false" fo:break-before="page"/>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writing-mode="lr-tb"/>
    </style:style>
    <style:style style:name="P9" style:family="paragraph" style:parent-style-name="Table_20_Contents">
      <style:text-properties fo:font-weight="bold"/>
    </style:style>
    <style:style style:name="P10" style:family="paragraph" style:parent-style-name="Text_20_body">
      <style:text-properties fo:font-weight="bold"/>
    </style:style>
    <style:style style:name="P11" style:family="paragraph" style:parent-style-name="Heading_20_2">
      <style:paragraph-properties fo:break-before="page"/>
      <style:text-properties officeooo:rsid="000961e7" officeooo:paragraph-rsid="000961e7"/>
    </style:style>
    <style:style style:name="P12" style:family="paragraph" style:parent-style-name="Heading_20_2">
      <style:paragraph-properties fo:break-before="page"/>
      <style:text-properties officeooo:rsid="0009a1d2" officeooo:paragraph-rsid="0009a1d2"/>
    </style:style>
    <style:style style:name="P13" style:family="paragraph" style:parent-style-name="Preformatted_20_Text">
      <style:paragraph-properties fo:margin-top="0cm" fo:margin-bottom="0.499cm" style:contextual-spacing="false"/>
    </style:style>
    <style:style style:name="P14" style:family="paragraph" style:parent-style-name="Text_20_body">
      <style:paragraph-properties fo:margin-top="0cm" fo:margin-bottom="0cm" style:contextual-spacing="false"/>
    </style:style>
    <style:style style:name="P15" style:family="paragraph" style:parent-style-name="Text_20_body">
      <style:paragraph-properties fo:margin-left="0cm" fo:margin-right="0cm" fo:text-indent="0cm" style:auto-text-indent="false"/>
      <style:text-properties officeooo:paragraph-rsid="000bdc3d"/>
    </style:style>
    <style:style style:name="P16" style:family="paragraph" style:parent-style-name="Heading_20_2">
      <style:paragraph-properties fo:break-before="page"/>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2">
      <style:text-properties fo:font-weight="bold"/>
    </style:style>
    <style:style style:name="P20" style:family="paragraph" style:parent-style-name="Text_20_body" style:list-style-name="L4">
      <style:text-properties fo:font-weight="bold"/>
    </style:style>
    <style:style style:name="P21" style:family="paragraph" style:parent-style-name="Text_20_body" style:list-style-name="L8">
      <style:text-properties fo:font-weight="bold"/>
    </style:style>
    <style:style style:name="P22" style:family="paragraph" style:parent-style-name="Text_20_body" style:list-style-name="L21">
      <style:text-properties fo:font-weight="bold"/>
    </style:style>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5">
      <style:paragraph-properties fo:margin-left="0cm" fo:margin-right="0cm" fo:text-indent="0cm" style:auto-text-indent="false"/>
    </style:style>
    <style:style style:name="P37" style:family="paragraph" style:parent-style-name="Text_20_body" style:list-style-name="L16"/>
    <style:style style:name="P38" style:family="paragraph" style:parent-style-name="Text_20_body" style:list-style-name="L16">
      <style:paragraph-properties fo:margin-left="0cm" fo:margin-right="0cm" fo:text-indent="0cm" style:auto-text-indent="false"/>
    </style:style>
    <style:style style:name="P39" style:family="paragraph" style:parent-style-name="Text_20_body" style:list-style-name="L17">
      <style:paragraph-properties fo:margin-left="0cm" fo:margin-right="0cm" fo:text-indent="0cm" style:auto-text-indent="false"/>
    </style:style>
    <style:style style:name="P40" style:family="paragraph" style:parent-style-name="Text_20_body" style:list-style-name="L18"/>
    <style:style style:name="P41" style:family="paragraph" style:parent-style-name="Text_20_body" style:list-style-name="L19"/>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list-style-name="L35"/>
    <style:style style:name="P58" style:family="paragraph" style:parent-style-name="Text_20_body" style:list-style-name="L36"/>
    <style:style style:name="P59" style:family="paragraph" style:parent-style-name="Text_20_body" style:list-style-name="L37"/>
    <style:style style:name="P60" style:family="paragraph" style:parent-style-name="Text_20_body" style:list-style-name="L38"/>
    <style:style style:name="P61" style:family="paragraph" style:parent-style-name="Text_20_body" style:list-style-name="L39"/>
    <style:style style:name="P62" style:family="paragraph" style:parent-style-name="Text_20_body" style:list-style-name="L40"/>
    <style:style style:name="P63" style:family="paragraph" style:parent-style-name="Text_20_body" style:list-style-name="L41"/>
    <style:style style:name="P64" style:family="paragraph" style:parent-style-name="Text_20_body" style:list-style-name="L42"/>
    <style:style style:name="P65" style:family="paragraph" style:parent-style-name="Text_20_body" style:list-style-name="L43"/>
    <style:style style:name="P66" style:family="paragraph" style:parent-style-name="Text_20_body" style:list-style-name="L44"/>
    <style:style style:name="P67" style:family="paragraph" style:parent-style-name="Text_20_body" style:list-style-name="L45"/>
    <style:style style:name="P68" style:family="paragraph" style:parent-style-name="Text_20_body" style:list-style-name="L46"/>
    <style:style style:name="P69" style:family="paragraph" style:parent-style-name="Text_20_body">
      <style:paragraph-properties fo:margin-left="0cm" fo:margin-right="0cm" fo:text-indent="0cm" style:auto-text-indent="false"/>
    </style:style>
    <style:style style:name="P70" style:family="paragraph" style:parent-style-name="Text_20_body" style:list-style-name="L47"/>
    <style:style style:name="P71" style:family="paragraph" style:parent-style-name="Text_20_body" style:list-style-name="L48"/>
    <style:style style:name="P72" style:family="paragraph" style:parent-style-name="Text_20_body" style:list-style-name="L49"/>
    <style:style style:name="T1" style:family="text">
      <style:text-properties fo:font-weight="bold"/>
    </style:style>
    <style:style style:name="T2" style:family="text">
      <style:text-properties fo:font-style="italic"/>
    </style:style>
    <style:style style:name="T3" style:family="text">
      <style:text-properties officeooo:rsid="000cb90e"/>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Résumé du Projet : backNScore (V1.0)</text:h>
      <text:p text:style-name="Text_20_body"><text:span text:style-name="T1">Objectif :</text:span> Créer un serveur de partitions centralisé capable de servir des terminaux modernes (PC, tablettes récentes) et de recycler des tablettes obsolètes (Android 4, 5, 6) comme pupitres numériques réactifs.</text:p>
      <text:h text:style-name="Heading_20_3" text:outline-level="3">⚙️ Architecture Backend (Flask / Python)</text:h>
      <text:p text:style-name="Text_20_body">Le serveur fait office de <text:span text:style-name="T1">passerelle de compatibilité</text:span> et de <text:span text:style-name="T1">chef d'orchestre</text:span> pour la synchronisation.</text:p>
      <text:list text:style-name="L1">
        <text:list-item>
          <text:p text:style-name="P17"><text:span text:style-name="T1">Gestion des ressources :</text:span> * Le serveur ne s'appuie pas sur une base de données SQL classique, mais sur une arborescence de fichiers structurée en <text:span text:style-name="T1">camelCase</text:span> (ex: <text:span text:style-name="Source_20_Text">styles/jazz/sonnymoonForTwo/</text:span>).</text:p>
          <text:list>
            <text:list-item>
              <text:p text:style-name="P17">Double distribution : Sert des <text:span text:style-name="T1">PDF</text:span> pour les clients modernes et un <text:span text:style-name="T1">jeu d'images JPG</text:span> (<text:span text:style-name="Source_20_Text">Instrument_pX.jpg</text:span>) pour les clients obsolètes.</text:p>
            </text:list-item>
          </text:list>
        </text:list-item>
        <text:list-item>
          <text:p text:style-name="P17"><text:span text:style-name="T1">Logique d'aiguillage :</text:span> Identification de l'obsolescence via le <text:span text:style-name="Source_20_Text">User-Agent</text:span> ou via des segments d'IP statiques (ex: <text:span text:style-name="Source_20_Text">.131</text:span>).</text:p>
        </text:list-item>
        <text:list-item>
          <text:p text:style-name="P17"><text:span text:style-name="T1">Système de Sync :</text:span> * <text:span text:style-name="Source_20_Text">sync_push</text:span> : Permet à un "maître" de pousser un morceau à tout l'orchestre.</text:p>
          <text:list>
            <text:list-item>
              <text:p text:style-name="P17"><text:span text:style-name="Source_20_Text">sync_check</text:span> : Endpoint ultra-léger interrogé par les clients pour s'aligner sur la <text:span text:style-name="Source_20_Text">location</text:span> et le <text:span text:style-name="Source_20_Text">pages_count</text:span> en temps réel.</text:p>
            </text:list-item>
          </text:list>
        </text:list-item>
        <text:list-item>
          <text:p text:style-name="P17"><text:span text:style-name="T1">Debug &amp; Spy :</text:span> Intégration d'un logger UDP (<text:span text:style-name="Source_20_Text">spy_log</text:span>) sur le port 9999 pour monitorer l'activité sans polluer les logs HTTP.</text:p>
        </text:list-item>
      </text:list>
      <text:h text:style-name="Heading_20_3" text:outline-level="3">📱 Client Pupitre (HTML5 / JS "Legacy")</text:h>
      <text:p text:style-name="Text_20_body">Une interface conçue pour la performance sur des moteurs de rendu Webkit/Blink anciens.</text:p>
      <text:list text:style-name="L2">
        <text:list-item>
          <text:p text:style-name="P18"><text:span text:style-name="T1">Moteur de rendu hybride :</text:span> * <text:span text:style-name="T1">Moderne :</text:span> Utilise <text:span text:style-name="Source_20_Text">PDF.js</text:span> pour un rendu vectoriel propre.</text:p>
          <text:list>
            <text:list-item>
              <text:p text:style-name="P18"><text:span text:style-name="T1">Obsolète :</text:span> Utilise un moteur "Image Heritage" qui change dynamiquement la source d'une balise <text:span text:style-name="Source_20_Text">&lt;img&gt;</text:span> avec un paramètre anti-cache (<text:span text:style-name="Source_20_Text">new Date().getTime()</text:span>).</text:p>
            </text:list-item>
          </text:list>
        </text:list-item>
        <text:list-item>
          <text:p text:style-name="P19">Interface UI :</text:p>
          <text:list>
            <text:list-item>
              <text:p text:style-name="P18">Barre d'outils fixe (70px) avec sélecteurs d'instruments, de voix (V1-V4), et options (Solo, Easy).</text:p>
            </text:list-item>
            <text:list-item>
              <text:p text:style-name="P18">Système de navigation par "clic zones" invisibles (gauche/droite) pour le tourné de page.</text:p>
            </text:list-item>
            <text:list-item>
              <text:p text:style-name="P18">Fil d'ariane (Breadcrumb) dynamique pour naviguer dans la bibliothèque.</text:p>
            </text:list-item>
          </text:list>
        </text:list-item>
        <text:list-item>
          <text:p text:style-name="P18"><text:span text:style-name="T1">Persistance :</text:span> Utilisation intensive du <text:span text:style-name="Source_20_Text">localStorage</text:span> pour mémoriser l'instrument, la voix et le dernier chemin parcouru.</text:p>
        </text:list-item>
      </text:list>
      <text:h text:style-name="Heading_20_3" text:outline-level="3"><text:soft-page-break/>🗂️ Structure de la "Database" (Système de fichiers)</text:h>
      <text:p text:style-name="Text_20_body">L'intelligence du projet repose sur la convention de nommage :</text:p>
      <text:list text:style-name="L3">
        <text:list-item>
          <text:p text:style-name="P23"><text:span text:style-name="T1">Racine :</text:span> <text:span text:style-name="Source_20_Text">database/</text:span></text:p>
        </text:list-item>
        <text:list-item>
          <text:p text:style-name="P23"><text:span text:style-name="T1">Dossier Morceau :</text:span> <text:span text:style-name="Source_20_Text">styles/genre/nomDuMorceau/</text:span></text:p>
        </text:list-item>
        <text:list-item>
          <text:p text:style-name="P23"><text:span text:style-name="T1">Fichiers :</text:span> * <text:span text:style-name="Source_20_Text">Instrument.pdf</text:span> (pour les modernes).</text:p>
          <text:list>
            <text:list-item>
              <text:p text:style-name="P23"><text:span text:style-name="Source_20_Text">Instrument_p1.jpg</text:span>, <text:span text:style-name="Source_20_Text">Instrument_p2.jpg</text:span> (pour les anciens).</text:p>
            </text:list-item>
          </text:list>
        </text:list-item>
      </text:list>
      <text:p text:style-name="Horizontal_20_Line"/>
      <text:h text:style-name="Heading_20_3" text:outline-level="3">🚀 État actuel et "Next Steps"</text:h>
      <text:list text:style-name="L4">
        <text:list-item>
          <text:p text:style-name="P24"><text:span text:style-name="T1">Acquis :</text:span> La communication Flask-Client est fonctionnelle, la détection d'obsolescence est en place, et le système de synchronisation par polling (3s) est opérationnel.</text:p>
        </text:list-item>
        <text:list-item>
          <text:p text:style-name="P20">À surveiller :</text:p>
          <text:list>
            <text:list-item>
              <text:p text:style-name="P24">Précision du <text:span text:style-name="Source_20_Text">pages_count</text:span> lors du scan des dossiers (distinguer les pages par instrument).</text:p>
            </text:list-item>
            <text:list-item>
              <text:p text:style-name="P24">Optimisation du rafraîchissement de la vue lors d'une synchronisation forcée pour éviter de perdre le scroll de l'utilisateur.</text:p>
            </text:list-item>
            <text:list-item>
              <text:p text:style-name="P24">Validation des chemins (CamelCase strict et sécurité <text:span text:style-name="Source_20_Text">safe_join</text:span>).</text:p>
            </text:list-item>
          </text:list>
        </text:list-item>
      </text:list>
      <text:p text:style-name="Quotations"><text:span text:style-name="T1">Note pour la doc :</text:span> Le projet privilégie la <text:span text:style-name="T1">stabilité réseau</text:span> et la <text:span text:style-name="T1">légèreté du DOM</text:span> pour garantir que même une tablette de 2012 puisse tourner une page sans latence rédhibitoire en plein concert.</text:p>
      <text:p text:style-name="Standard"/>
      <text:h text:style-name="P3" text:outline-level="2">🏗️ Architecture Globale : Back'n Score</text:h>
      <text:p text:style-name="Text_20_body">Le système repose sur une séparation stricte entre la <text:span text:style-name="T1">Navigation</text:span> (choix manuels) et le <text:span text:style-name="T1">Mode Pupitre</text:span> (affichage et synchronisation).</text:p>
      <text:h text:style-name="Heading_20_3" text:outline-level="3">1. Philosophie de Synchronisation (Polling Sélectif)</text:h>
      <text:list text:style-name="L5">
        <text:list-item>
          <text:p text:style-name="P25"><text:span text:style-name="T1">Le principe :</text:span> Le <text:span text:style-name="Source_20_Text">checkSync</text:span> (polling) n'est actif <text:span text:style-name="T1">que</text:span> lorsque le musicien est en "Mode Pupitre" (partition affichée).</text:p>
        </text:list-item>
        <text:list-item>
          <text:p text:style-name="P25"><text:span text:style-name="T1">L'avantage :</text:span> On évite que le serveur n'interrompe le musicien lorsqu'il navigue dans les menus (choix d'instrument ou de morceau).</text:p>
        </text:list-item>
        <text:list-item>
          <text:p text:style-name="P25"><text:span text:style-name="T1">Déclencheur :</text:span> Le cycle de synchro s'arrête lors d'un clic menu et redémarre à la fin de la fonction <text:span text:style-name="Source_20_Text">openScore</text:span>.</text:p>
        </text:list-item>
      </text:list>
      <text:h text:style-name="Heading_20_3" text:outline-level="3">2. Gestion de la "Vérité" des données</text:h>
      <text:p text:style-name="Text_20_body">Pour éviter les conflits entre le serveur et le client, les responsabilités sont ainsi réparties :</text:p>
      <text:list text:style-name="L6">
        <text:list-item>
          <text:p text:style-name="P26"><text:span text:style-name="T1">Le Dossier (</text:span><text:span text:style-name="Source_20_Text"><text:span text:style-name="T1">location</text:span></text:span><text:span text:style-name="T1">) :</text:span> Le serveur est maître. Il impose le dossier du morceau via <text:span text:style-name="Source_20_Text">sync_check</text:span>.</text:p>
        </text:list-item>
        <text:list-item>
          <text:p text:style-name="P26"><text:span text:style-name="T1">La Pagination (</text:span><text:span text:style-name="Source_20_Text"><text:span text:style-name="T1">TOTAL_PAGES</text:span></text:span><text:span text:style-name="T1">) :</text:span></text:p>
          <text:list>
            <text:list-item>
              <text:p text:style-name="P26"><text:span text:style-name="T1">Mode PDF (Moderne) :</text:span> Le client est maître. Il ignore les infos serveur et utilise <text:span text:style-name="Source_20_Text">doc.numPages</text:span> après analyse du fichier.</text:p>
            </text:list-item>
            <text:list-item>
              <text:p text:style-name="P26"><text:span text:style-name="T1">Mode JPG (Obsolète) :</text:span> Détection par l'échec (Brute Force). Le client incrémente les pages jusqu'à recevoir une erreur <text:span text:style-name="T1">404</text:span>, définissant ainsi la fin du morceau.</text:p>
            </text:list-item>
          </text:list>
        </text:list-item>
      </text:list>
      <text:h text:style-name="Heading_20_3" text:outline-level="3">3. Cycle de Rendu Intelligent (Anti-Gaspillage)</text:h>
      <text:p text:style-name="Text_20_body">Pour garantir la fluidité et éviter de retélécharger inutilement les fichiers du serveur :</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Contexte</text:p>
            </table:table-cell>
            <table:table-cell table:style-name="Tableau1.A1" office:value-type="string">
              <text:p text:style-name="Table_20_Heading">Action Réseau</text:p>
            </table:table-cell>
            <table:table-cell table:style-name="Tableau1.A1" office:value-type="string">
              <text:p text:style-name="Table_20_Heading">Comportement de Rendu</text:p>
            </table:table-cell>
          </table:table-row>
        </table:table-header-rows>
        <table:table-row>
          <table:table-cell table:style-name="Tableau1.A1" office:value-type="string">
            <text:p text:style-name="P9">Nouveau Morceau</text:p>
          </table:table-cell>
          <table:table-cell table:style-name="Tableau1.A1" office:value-type="string">
            <text:p text:style-name="Table_20_Contents"><text:span text:style-name="Source_20_Text">GET /get_score</text:span></text:p>
          </table:table-cell>
          <table:table-cell table:style-name="Tableau1.A1" office:value-type="string">
            <text:p text:style-name="Table_20_Contents">Réinitialisation complète, <text:span text:style-name="Source_20_Text">page = 1</text:span>.</text:p>
          </table:table-cell>
        </table:table-row>
        <table:table-row>
          <table:table-cell table:style-name="Tableau1.A1" office:value-type="string">
            <text:p text:style-name="Table_20_Contents"><text:span text:style-name="T1">Changement d'Option</text:span> (Solo/Voix/Inst)</text:p>
          </table:table-cell>
          <table:table-cell table:style-name="Tableau1.A1" office:value-type="string">
            <text:p text:style-name="Table_20_Contents"><text:span text:style-name="Source_20_Text">GET /get_score</text:span></text:p>
          </table:table-cell>
          <table:table-cell table:style-name="Tableau1.A1" office:value-type="string">
            <text:p text:style-name="Table_20_Contents">Téléchargement du nouveau fichier, conservation de la page actuelle.</text:p>
          </table:table-cell>
        </table:table-row>
        <table:table-row>
          <table:table-cell table:style-name="Tableau1.A1" office:value-type="string">
            <text:p text:style-name="Table_20_Contents"><text:span text:style-name="T1">Retour du Menu</text:span> (Même morceau)</text:p>
          </table:table-cell>
          <table:table-cell table:style-name="Tableau1.A1" office:value-type="string">
            <text:p text:style-name="P9">AUCUNE</text:p>
          </table:table-cell>
          <table:table-cell table:style-name="Tableau1.A1" office:value-type="string">
            <text:p text:style-name="Table_20_Contents">Réutilisation de l'objet <text:span text:style-name="Source_20_Text">PDF_DOC</text:span> en mémoire (instantané).</text:p>
          </table:table-cell>
        </table:table-row>
        <table:table-row>
          <table:table-cell table:style-name="Tableau1.A1" office:value-type="string">
            <text:p text:style-name="Table_20_Contents"><text:span text:style-name="T1">Redimensionnement</text:span> (Resize)</text:p>
          </table:table-cell>
          <table:table-cell table:style-name="Tableau1.A1" office:value-type="string">
            <text:p text:style-name="P9">AUCUNE</text:p>
          </table:table-cell>
          <table:table-cell table:style-name="Tableau1.A1" office:value-type="string">
            <text:p text:style-name="Table_20_Contents">Redessine le Canvas actuel avec un délai de stabilisation (<text:span text:style-name="T2">Debounce</text:span>).</text:p>
          </table:table-cell>
        </table:table-row>
      </table:table>
      <text:p text:style-name="Standard"/>
      <text:h text:style-name="P1" text:outline-level="3">1. Le comportement immédiat : "L'immunité du Menu"</text:h>
      <text:p text:style-name="Text_20_body">Puisque le <text:span text:style-name="Source_20_Text">setInterval</text:span> de <text:span text:style-name="Source_20_Text">checkSync</text:span> est <text:span text:style-name="T1">arrêté</text:span> dès que l'utilisateur entre dans le menu (Tree), le client ne demande plus rien au serveur.</text:p>
      <text:list text:style-name="L7">
        <text:list-item>
          <text:p text:style-name="P27"><text:span text:style-name="T1">Résultat :</text:span> Le musicien peut continuer à naviguer tranquillement dans l'arborescence des morceaux. Son écran ne sautera pas, même si le reste de l'orchestre change de partition.</text:p>
        </text:list-item>
      </text:list>
      <text:h text:style-name="Heading_20_3" text:outline-level="3">2. Le "Conflit de Sortie" (Le moment de vérité)</text:h>
      <text:p text:style-name="Text_20_body">Le problème se déplace au moment où le musicien finit son choix et clique sur un morceau pour l'ouvrir. On a alors deux scénarios :</text:p>
      <text:list text:style-name="L8">
        <text:list-item>
          <text:p text:style-name="P21">Scénario A : Le musicien choisit son morceau.</text:p>
          <text:list>
            <text:list-item>
              <text:p text:style-name="P28">Il clique sur "Caminito".</text:p>
            </text:list-item>
            <text:list-item>
              <text:p text:style-name="P28"><text:span text:style-name="Source_20_Text">openScore</text:span> est appelé.</text:p>
            </text:list-item>
            <text:list-item>
              <text:p text:style-name="P28">Le client envoie un <text:span text:style-name="Source_20_Text">sync_push</text:span> au serveur : <text:span text:style-name="T2">"Maintenant, tout le monde joue Caminito"</text:span>.</text:p>
            </text:list-item>
            <text:list-item>
              <text:p text:style-name="P28"><text:span text:style-name="T1">Conséquence :</text:span> Il reprend la main et "écrase" le choix précédent de l'autre client. L'orchestre le suit.</text:p>
            </text:list-item>
          </text:list>
        </text:list-item>
        <text:list-item>
          <text:p text:style-name="P21">Scénario B : Le musicien annule ou revient en arrière.</text:p>
          <text:list>
            <text:list-item text:start-value="1">
              <text:p text:style-name="P28">S'il décide de ne rien choisir et de revenir à l'affichage précédent.</text:p>
            </text:list-item>
            <text:list-item>
              <text:p text:style-name="P28"><text:span text:style-name="Source_20_Text">openScore</text:span> est relancé avec la <text:span text:style-name="Source_20_Text">LAST_LOCATION</text:span> stockée.</text:p>
            </text:list-item>
            <text:list-item>
              <text:p text:style-name="P28">Le <text:span text:style-name="Source_20_Text">setInterval</text:span> de synchro redémarre.</text:p>
            </text:list-item>
            <text:list-item>
              <text:p text:style-name="P28">Au premier cycle (max 2s), <text:span text:style-name="Source_20_Text">checkSync</text:span> voit que le serveur est sur un nouveau morceau (celui choisi par l'autre client).</text:p>
            </text:list-item>
            <text:list-item>
              <text:p text:style-name="P28"><text:span text:style-name="T1">Conséquence :</text:span> La partition se met à jour automatiquement pour s'aligner sur l'orchestre.</text:p>
            </text:list-item>
          </text:list>
        </text:list-item>
      </text:list>
      <text:h text:style-name="Heading_20_3" text:outline-level="3">3. Le cas particulier : "L'écoute passive"</text:h>
      <text:p text:style-name="Text_20_body">Si tu souhaites que le musicien voit <text:span text:style-name="T1">visuellement</text:span> dans son menu (Tree) que le morceau a changé ailleurs (par exemple, que le titre sélectionné en jaune change tout seul pendant qu'il regarde la liste), il faudrait :</text:p>
      <text:list text:style-name="L9">
        <text:list-item>
          <text:p text:style-name="P29">Laisser <text:span text:style-name="Source_20_Text">checkSync</text:span> tourner dans le menu.</text:p>
        </text:list-item>
        <text:list-item>
          <text:p text:style-name="P29">Mais modifier sa fonction de retour : au lieu d'appeler <text:span text:style-name="Source_20_Text">openScore</text:span> (qui détruit le menu), il appellerait juste une fonction <text:span text:style-name="Source_20_Text">highlightCurrentTrack()</text:span> qui met à jour la couleur du texte dans la liste.</text:p>
        </text:list-item>
      </text:list>
      <text:h text:style-name="Heading_20_3" text:outline-level="3">Ma recommandation</text:h>
      <text:p text:style-name="Text_20_body">Pour rester sur ton objectif de stabilité : <text:span text:style-name="T1">on ne change rien</text:span>. L'immunité totale dans le menu est la solution la plus robuste. Un musicien qui cherche une partition ne veut pas être interrompu. S'il veut <text:soft-page-break/>se synchroniser, il lui suffit de sortir du menu, et le polling le recalera sur le bon morceau en moins de 2 secondes.</text:p>
      <text:p text:style-name="Standard"/>
      <text:h text:style-name="P5" text:outline-level="3">Scénario : Le musicien est dans le menu, l'orchestre change de morceau.</text:h>
      <text:section text:style-name="Sect1" text:name="model-response-message-contentr_1d97462054c9a0f5">
        <text:list text:style-name="L10">
          <text:list-item>
            <text:p text:style-name="P30"><text:span text:style-name="T1">Isolation</text:span> : Le client en mode menu ne reçoit aucun ordre. Il termine sa recherche tranquillement.</text:p>
          </text:list-item>
          <text:list-item>
            <text:p text:style-name="P30"><text:span text:style-name="T1">Validation</text:span> :</text:p>
            <text:list>
              <text:list-item>
                <text:p text:style-name="P30">S'il clique sur un morceau : <text:span text:style-name="T1">Il devient le nouveau maître</text:span>. Il impose son choix à tout le monde via le <text:span text:style-name="Source_20_Text">sync_push</text:span>.</text:p>
              </text:list-item>
              <text:list-item>
                <text:p text:style-name="P30">S'il annule ou affiche la partition courante : <text:span text:style-name="T1">Il redevient esclave</text:span>. Le polling reprend, voit le décalage, et le recale sur le morceau de l'orchestre en moins de 2 secondes.</text:p>
              </text:list-item>
            </text:list>
          </text:list-item>
        </text:list>
        <text:p text:style-name="Text_20_body">C'est un système "dernier parleur a raison" qui est très intuitif en répétition ou en concert : celui qui sélectionne une partition décide pour les autres.</text:p>
        <text:p text:style-name="Horizontal_20_Line"/>
        <text:h text:style-name="Heading_20_3" text:outline-level="3">Prochaines étapes suggérées :</text:h>
        <text:p text:style-name="Text_20_body">On a la doc, on a la stratégie. Quand tu seras prêt à passer au code, on pourra s'attaquer à :</text:p>
        <text:list text:style-name="L11">
          <text:list-item>
            <text:p text:style-name="P31"><text:span text:style-name="T1">Le nettoyage de </text:span><text:span text:style-name="Source_20_Text"><text:span text:style-name="T1">app-sync.js</text:span></text:span> pour retirer la gestion de <text:span text:style-name="Source_20_Text">TOTAL_PAGES</text:span>.</text:p>
          </text:list-item>
          <text:list-item>
            <text:p text:style-name="P31"><text:span text:style-name="T1">La sécurisation de </text:span><text:span text:style-name="Source_20_Text"><text:span text:style-name="T1">renderPDFPage</text:span></text:span> pour régler ce problème d'échelle (scale) sur les tablettes modernes.</text:p>
          </text:list-item>
          <text:list-item>
            <text:p text:style-name="P31"><text:span text:style-name="T1">L'ajout de l'</text:span><text:span text:style-name="Source_20_Text"><text:span text:style-name="T1">onerror</text:span></text:span> sur l'image pour le mode obsolète (JPG).</text:p>
          </text:list-item>
        </text:list>
        <text:p text:style-name="Text_20_body"/>
      </text:section>
      <text:p text:style-name="Standard"/>
      <text:h text:style-name="P3" text:outline-level="2">📐 Cahier des Charges : Adaptation au Format Réel</text:h>
      <text:h text:style-name="Heading_20_3" text:outline-level="3">1. Extraction des Dimensions Sources</text:h>
      <text:list text:style-name="L12">
        <text:list-item>
          <text:p text:style-name="P32"><text:span text:style-name="T1">Pour le PDF :</text:span> On utilise <text:span text:style-name="Source_20_Text">page.getViewport({ scale: 1 })</text:span>. Cela nous donne les <text:span text:style-name="Source_20_Text">width</text:span> et <text:span text:style-name="Source_20_Text">height</text:span> réels définis dans le fichier PDF (en points).</text:p>
        </text:list-item>
        <text:list-item>
          <text:p text:style-name="P32"><text:span text:style-name="T1">Pour le JPG :</text:span> On utilise les propriétés <text:span text:style-name="Source_20_Text">naturalWidth</text:span> et <text:span text:style-name="Source_20_Text">naturalHeight</text:span> de l'élément Image une fois chargé.</text:p>
        </text:list-item>
      </text:list>
      <text:h text:style-name="Heading_20_3" text:outline-level="3">2. Algorithme de "Best Fit" (Le plus adapté)</text:h>
      <text:p text:style-name="P7">Le but est de calculer un coefficient (k) unique. On mesure l'espace disponible dans le navigateur (Wdispo​, Hdispo​) et on compare avec le fichier (wsrc​, hsrc​).</text:p>
      <text:p text:style-name="Text_20_body">La formule magique pour ne jamais dépasser et rester centré est :</text:p>
      <text:p text:style-name="P7">k=min(wsrc​Wdispo​​,hsrc​Hdispo​​)</text:p>
      <text:h text:style-name="Heading_20_3" text:outline-level="3">3. Mise en œuvre dans le Viewer</text:h>
      <text:h text:style-name="Heading_20_4" text:outline-level="4">Pour le mode PDF (Moderne)</text:h>
      <text:p text:style-name="Text_20_body">On ne se contente pas de dessiner, on ajuste le <text:span text:style-name="Source_20_Text">viewport</text:span> dynamiquement :</text:p>
      <text:list text:style-name="L13">
        <text:list-item>
          <text:p text:style-name="P33">On récupère la page.</text:p>
        </text:list-item>
        <text:list-item>
          <text:p text:style-name="P33">On calcule le ratio par rapport à <text:span text:style-name="Source_20_Text">window.innerWidth</text:span> et <text:span text:style-name="Source_20_Text">window.innerHeight</text:span>.</text:p>
        </text:list-item>
        <text:list-item>
          <text:p text:style-name="P33">On applique ce ratio au rendu.</text:p>
        </text:list-item>
        <text:list-item>
          <text:p text:style-name="P33"><text:span text:style-name="T1">Bonus Netteté :</text:span> On multiplie le rendu par 2 (HiDPI) mais on force le Canvas à rester à 100% de la place calculée en CSS pour éviter le flou sur les tablettes récentes.</text:p>
        </text:list-item>
      </text:list>
      <text:h text:style-name="Heading_20_4" text:outline-level="4">Pour le mode Image (Obsolète)</text:h>
      <text:p text:style-name="Text_20_body">Puisque les vieux navigateurs Android 4 ne supportent pas bien <text:span text:style-name="Source_20_Text">object-fit: contain</text:span>, on va simuler ce comportement :</text:p>
      <text:list text:style-name="L14">
        <text:list-item>
          <text:p text:style-name="P34">Si le ratio de l'image est plus "haut" que celui de l'écran : on force <text:span text:style-name="Source_20_Text">height: 100%</text:span> et <text:span text:style-name="Source_20_Text">width: auto</text:span>.</text:p>
        </text:list-item>
        <text:list-item>
          <text:p text:style-name="P34">Si le ratio de l'image est plus "large" (ex: format paysage) : on force <text:span text:style-name="Source_20_Text">width: 100%</text:span> et <text:span text:style-name="Source_20_Text">height: auto</text:span>.</text:p>
        </text:list-item>
      </text:list>
      <text:p text:style-name="Standard"/>
      <text:h text:style-name="P3" text:outline-level="2">📋 Cahier des Charges : Mode Duo (Landscape)</text:h>
      <text:h text:style-name="Heading_20_3" text:outline-level="3">1. La Détection d'Intention</text:h>
      <text:p text:style-name="Text_20_body">Le script doit décider seul du mode à adopter selon deux critères :</text:p>
      <text:list text:style-name="L15">
        <text:list-item>
          <text:p text:style-name="P36"><text:span text:style-name="T1">L'Orientation :</text:span> La largeur de l'écran est-elle supérieure à sa hauteur ? (W&gt;H)</text:p>
        </text:list-item>
        <text:list-item>
          <text:p text:style-name="P35"><text:span text:style-name="T1">La Disponibilité :</text:span> Le document possède-t-il plus d'une page ?</text:p>
        </text:list-item>
      </text:list>
      <text:h text:style-name="Heading_20_3" text:outline-level="3">2. La Logique de Pagination (Le "Saut de Deux")</text:h>
      <text:p text:style-name="P7">En mode Duo, tourner la page ne doit pas faire 1→2, mais 1→3.</text:p>
      <text:list text:style-name="L16">
        <text:list-item>
          <text:p text:style-name="P38"><text:span text:style-name="T1">Pages affichées :</text:span> On affiche toujours N et N+1.</text:p>
        </text:list-item>
        <text:list-item>
          <text:p text:style-name="P37"><text:span text:style-name="T1">Cas particulier :</text:span> Si le PDF a un nombre impair de pages, la dernière page doit s'afficher seule (ou avec un fond vide) pour éviter de chercher une page qui n'existe pas.</text:p>
        </text:list-item>
      </text:list>
      <text:h text:style-name="Heading_20_3" text:outline-level="3">3. Le Calcul d'Échelle "Double"</text:h>
      <text:p text:style-name="Text_20_body">Le calculateur universel doit être modifié. En mode paysage, on ne calcule plus sur la base d'une page, mais d'un <text:span text:style-name="T1">rectangle virtuel de deux pages côte à côte</text:span>.</text:p>
      <text:list text:style-name="L17">
        <text:list-item>
          <text:p text:style-name="P39">LargeurVirtuelle​=wsrc​×2</text:p>
        </text:list-item>
        <text:list-item>
          <text:p text:style-name="P39">HauteurVirtuelle​=hsrc​</text:p>
        </text:list-item>
      </text:list>
      <text:p text:style-name="Horizontal_20_Line"/>
      <text:p text:style-name="Standard"/>
      <text:h text:style-name="P1" text:outline-level="3">🏗️ Structure Finale du Projet</text:h>
      <text:p text:style-name="Text_20_body">Le projet est maintenant découpé en unités logiques. Si on doit modifier une fonction, on sait exactement quel fichier ouvrir sans risquer d'impacter le reste.</text:p>
      <text:h text:style-name="Heading_20_4" text:outline-level="4">1. Le Cœur du Serveur (<text:span text:style-name="Source_20_Text">/</text:span>)</text:h>
      <text:list text:style-name="L18">
        <text:list-item>
          <text:p text:style-name="P40"><text:span text:style-name="Source_20_Text"><text:span text:style-name="T1">server.py</text:span></text:span> : C'est le "Standardiste". Il ne contient que les routes Flask. Il reçoit les appels et les délègue aux modules du dossier <text:span text:style-name="Source_20_Text">scripts/</text:span>.</text:p>
        </text:list-item>
      </text:list>
      <text:h text:style-name="Heading_20_4" text:outline-level="4">2. La Logique Métier (<text:span text:style-name="Source_20_Text">/scripts/</text:span>)</text:h>
      <text:list text:style-name="L19">
        <text:list-item>
          <text:p text:style-name="P41"><text:span text:style-name="Source_20_Text"><text:span text:style-name="T1">network_utils.py</text:span></text:span> : Gère l'identité (CID), la détection des tablettes obsolètes et les communications avec l'espion UDP (<text:span text:style-name="Source_20_Text">spy_log</text:span>).</text:p>
        </text:list-item>
        <text:list-item>
          <text:p text:style-name="P41"><text:span text:style-name="Source_20_Text"><text:span text:style-name="T1">score_manager.py</text:span></text:span> : Le "Cerveau". Il gère l'état de la synchro et la logique de recherche des fichiers (le fameux système de "Rabat" PDF/JPG).</text:p>
        </text:list-item>
        <text:list-item>
          <text:p text:style-name="P41"><text:span text:style-name="Source_20_Text"><text:span text:style-name="T1">instruments.py</text:span></text:span> : Contient les définitions des modes (Popular/Classy).</text:p>
        </text:list-item>
      </text:list>
      <text:h text:style-name="Heading_20_4" text:outline-level="4">3. L'Interface Client (<text:span text:style-name="Source_20_Text">/web/</text:span> &amp; <text:span text:style-name="Source_20_Text">/static/</text:span>)</text:h>
      <text:list text:style-name="L20">
        <text:list-item>
          <text:p text:style-name="P42"><text:span text:style-name="Source_20_Text"><text:span text:style-name="T1">web/pupitre.html</text:span></text:span> : Le squelette HTML pur.</text:p>
        </text:list-item>
        <text:list-item>
          <text:p text:style-name="P42"><text:span text:style-name="Source_20_Text"><text:span text:style-name="T1">static/css/pupitre.css</text:span></text:span> : Tout l'habillage visuel.</text:p>
        </text:list-item>
        <text:list-item>
          <text:p text:style-name="P42"><text:span text:style-name="Source_20_Text"><text:span text:style-name="T1">static/js/app-core.js</text:span></text:span> : Initialisation et variables globales.</text:p>
        </text:list-item>
        <text:list-item>
          <text:p text:style-name="P42"><text:span text:style-name="Source_20_Text"><text:span text:style-name="T1">static/js/app-sync.js</text:span></text:span> : Toute la communication AJAX avec le serveur.</text:p>
        </text:list-item>
        <text:list-item>
          <text:p text:style-name="P42"><text:span text:style-name="Source_20_Text"><text:span text:style-name="T1">static/js/app-ui.js</text:span></text:span> : La gestion des menus et de la bibliothèque.</text:p>
        </text:list-item>
        <text:list-item>
          <text:p text:style-name="P42"><text:span text:style-name="Source_20_Text"><text:span text:style-name="T1">static/js/app-viewer.js</text:span></text:span> : L'affichage des partitions (PDF.js ou Images).</text:p>
        </text:list-item>
      </text:list>
      <text:p text:style-name="Standard"/>
      <text:p text:style-name="P2">Voici les trois chronogrammes clés qui régissent le comportement de tes tablettes.</text:p>
      <text:p text:style-name="Horizontal_20_Line"/>
      <text:h text:style-name="Heading_20_3" text:outline-level="3">1. Chronogramme : Démarrage à froid (F5 ou Allumage)</text:h>
      <text:p text:style-name="P4">Objectif : Garantir que la tablette ne demande rien avant d'être totalement prête.</text:p>
      <text:list text:style-name="L21">
        <text:list-item>
          <text:p text:style-name="P43"><text:span text:style-name="T1">Client (Navigateur) :</text:span> Chargement de la page et lecture de <text:span text:style-name="Source_20_Text">app-sync.js</text:span>.</text:p>
        </text:list-item>
        <text:list-item>
          <text:p text:style-name="P43"><text:span text:style-name="T1">Client :</text:span> Lecture du <text:span text:style-name="Source_20_Text">localStorage</text:span> (Instrument, Mode, Easy, Solo, Voix).</text:p>
        </text:list-item>
        <text:list-item>
          <text:p text:style-name="P43"><text:span text:style-name="T1">Client :</text:span> Lancement des requêtes parallèles pour les 3 fichiers JSON (<text:span text:style-name="Source_20_Text">db_tracks</text:span>, <text:span text:style-name="Source_20_Text">ui_popular</text:span>, <text:span text:style-name="Source_20_Text">ui_classy</text:span>).</text:p>
        </text:list-item>
        <text:list-item>
          <text:p text:style-name="P43"><text:span text:style-name="T1">Client [Barrière de Sécurité] :</text:span> Attente que <text:span text:style-name="Source_20_Text">loadedCount === 3</text:span> <text:span text:style-name="T1">ET</text:span> que l'événement <text:span text:style-name="Source_20_Text">DOMContentLoaded</text:span> soit levé (DOM stable).</text:p>
        </text:list-item>
        <text:list-item>
          <text:p text:style-name="P43"><text:span text:style-name="T1">Client → Serveur :</text:span> Requête de synchronisation avec passage des paramètres (Instrument, Mode, etc.).</text:p>
        </text:list-item>
        <text:list-item>
          <text:p text:style-name="P43"><text:span text:style-name="T1">Serveur :</text:span> Exécution de <text:span text:style-name="Source_20_Text">getScoreName.py</text:span>.</text:p>
        </text:list-item>
        <text:list-item>
          <text:p text:style-name="P43"><text:span text:style-name="T1">Serveur → Client :</text:span> Envoi du nom du fichier (ex: <text:span text:style-name="Source_20_Text">trompette.pdf</text:span>) ou d'un message d'erreur.</text:p>
        </text:list-item>
        <text:list-item>
          <text:p text:style-name="P22">Client :</text:p>
          <text:list>
            <text:list-item>
              <text:p text:style-name="P43"><text:span text:style-name="T2">Si succès :</text:span> Téléchargement et affichage du PDF dans <text:span text:style-name="Source_20_Text">contentDiv</text:span>.</text:p>
            </text:list-item>
            <text:list-item>
              <text:p text:style-name="P43"><text:span text:style-name="T2">Si erreur :</text:span> Affichage du message <text:span text:style-name="Source_20_Text">_LAST_ERROR</text:span> dans <text:span text:style-name="Source_20_Text">contentDiv</text:span>.</text:p>
            </text:list-item>
          </text:list>
        </text:list-item>
      </text:list>
      <text:p text:style-name="Horizontal_20_Line"/>
      <text:h text:style-name="Heading_20_3" text:outline-level="3">2. Chronogramme : Changement d'Instrument ou de Mode</text:h>
      <text:p text:style-name="P4">Objectif : Forcer la réévaluation de la partition sans attendre un changement de morceau côté serveur.</text:p>
      <text:list text:style-name="L22">
        <text:list-item>
          <text:p text:style-name="P44"><text:span text:style-name="T1">Musicien :</text:span> Sélection d'un nouvel instrument/mode dans l'arbre de navigation.</text:p>
        </text:list-item>
        <text:list-item>
          <text:p text:style-name="P44"><text:span text:style-name="T1">Client :</text:span> Mise à jour immédiate du <text:span text:style-name="Source_20_Text">localStorage</text:span>.</text:p>
        </text:list-item>
        <text:list-item>
          <text:p text:style-name="P44"><text:span text:style-name="T1">Client [Trigger] :</text:span> Fermeture du menu et appel <text:span text:style-name="T1">forcé</text:span> à la fonction de synchronisation.</text:p>
        </text:list-item>
        <text:list-item>
          <text:p text:style-name="P44"><text:span text:style-name="T1">Client → Serveur :</text:span> Envoi des nouveaux paramètres (Nouvel instrument, Nouveau mode, etc.).</text:p>
        </text:list-item>
        <text:list-item>
          <text:p text:style-name="P44"><text:span text:style-name="T1">Serveur :</text:span> Ré-exécution de <text:span text:style-name="Source_20_Text">getScoreName.py</text:span> avec le morceau actuel mais le nouvel instrument.</text:p>
        </text:list-item>
        <text:list-item>
          <text:p text:style-name="P44"><text:span text:style-name="T1">Serveur → Client :</text:span> Envoi du nouveau nom de fichier calculé.</text:p>
        </text:list-item>
        <text:list-item>
          <text:p text:style-name="P44"><text:span text:style-name="T1">Client :</text:span> Remplacement de la partition affichée (ou affichage de l'erreur si la substitution échoue pour ce nouvel instrument).</text:p>
        </text:list-item>
      </text:list>
      <text:p text:style-name="Horizontal_20_Line"/>
      <text:h text:style-name="Heading_20_3" text:outline-level="3"><text:soft-page-break/>3. Chronogramme : Synchronisation en cours de jeu</text:h>
      <text:p text:style-name="P4">Objectif : Suivre le chef d'orchestre (le serveur) en temps réel.</text:p>
      <text:list text:style-name="L23">
        <text:list-item>
          <text:p text:style-name="P45"><text:span text:style-name="T1">Serveur (Action Chef) :</text:span> Le morceau change ou avance.</text:p>
        </text:list-item>
        <text:list-item>
          <text:p text:style-name="P45"><text:span text:style-name="T1">Client [Polling] :</text:span> La requête périodique (intervalle) de synchronisation arrive au serveur.</text:p>
        </text:list-item>
        <text:list-item>
          <text:p text:style-name="P45"><text:span text:style-name="T1">Serveur :</text:span> Identifie le morceau en cours et appelle <text:span text:style-name="Source_20_Text">getScoreName.py</text:span> pour cet instrument spécifique.</text:p>
        </text:list-item>
        <text:list-item>
          <text:p text:style-name="P45"><text:span text:style-name="T1">Serveur → Client :</text:span> Réponse avec le nouveau chemin PDF.</text:p>
        </text:list-item>
        <text:list-item>
          <text:p text:style-name="P45"><text:span text:style-name="T1">Client :</text:span> * Comparaison avec <text:span text:style-name="Source_20_Text">last_track_loc</text:span>.</text:p>
          <text:list>
            <text:list-item>
              <text:p text:style-name="P45">Chargement du nouveau PDF.</text:p>
            </text:list-item>
            <text:list-item>
              <text:p text:style-name="P45"><text:span text:style-name="T1">Action Highlight :</text:span> Si le menu est ouvert, mise à jour du jaune sur la nouvelle ligne après un délai de 500ms (stabilité DOM).</text:p>
            </text:list-item>
          </text:list>
        </text:list-item>
      </text:list>
      <text:p text:style-name="Horizontal_20_Line"/>
      <text:p text:style-name="Standard"/>
      <text:h text:style-name="P3" text:outline-level="2">🛠 Architecture Serveur : Optimisation pour Raspberry Pi</text:h>
      <text:h text:style-name="Heading_20_3" text:outline-level="3">1. Stratégie "Pré-calcul vs Temps réel"</text:h>
      <text:p text:style-name="Text_20_body">Le choix technique majeur repose sur la <text:span text:style-name="T1">moulinette Delta</text:span> exécutée sur le PC de développement.</text:p>
      <text:list text:style-name="L24">
        <text:list-item>
          <text:p text:style-name="P46"><text:span text:style-name="T1">Action :</text:span> Conversion des PDF (complexes) en JPG (statiques) avant le déploiement.</text:p>
        </text:list-item>
        <text:list-item>
          <text:p text:style-name="P46"><text:span text:style-name="T1">Bénéfice :</text:span> La Raspberry Pi est déchargée de toute tâche lourde (rendu graphique). Elle ne fait que "pousser" des fichiers existants, ce qui consomme très peu de CPU.</text:p>
        </text:list-item>
      </text:list>
      <text:h text:style-name="Heading_20_3" text:outline-level="3">2. Gestion de la charge (50 Musiciens simultanés)</text:h>
      <text:p text:style-name="Text_20_body">Pour garantir la fluidité lors d'une répétition d'harmonie, le système repose sur une séparation des rôles :</text:p>
      <text:list text:style-name="L25">
        <text:list-item>
          <text:p text:style-name="P47"><text:span text:style-name="T1">Le Serveur de Fichiers (Statique) :</text:span> L'utilisation de <text:span text:style-name="T1">Nginx</text:span> en amont de Flask est recommandée. Nginx gère l'envoi des 8 Go de données JPG de manière asynchrone, libérant Flask pour la logique métier.</text:p>
        </text:list-item>
        <text:list-item>
          <text:p text:style-name="P47"><text:span text:style-name="T1">La Logique de Synchronisation (Dynamique) :</text:span> Contrairement à une architecture PHP qui lirait le disque à chaque requête, <text:span text:style-name="T1">Flask</text:span> garde la variable <text:span text:style-name="Source_20_Text">trackLocation</text:span> en RAM.</text:p>
          <text:list>
            <text:list-item>
              <text:p text:style-name="P47"><text:span text:style-name="T1">Performance :</text:span> Le <text:span text:style-name="Source_20_Text">sync_check</text:span> répond en quelques millisecondes.</text:p>
            </text:list-item>
            <text:list-item>
              <text:p text:style-name="P47"><text:span text:style-name="T1">Économie :</text:span> Réduction drastique des accès à la carte SD (prolongeant sa durée de vie).</text:p>
            </text:list-item>
          </text:list>
        </text:list-item>
      </text:list>
      <text:h text:style-name="Heading_20_3" text:outline-level="3">3. Optimisation des données (Poids vs Réseau)</text:h>
      <text:p text:style-name="Text_20_body">Le goulot d'étranglement sur une Pi en situation réelle est souvent la <text:span text:style-name="T1">bande passante Wi-Fi</text:span>.</text:p>
      <text:list text:style-name="L26">
        <text:list-item>
          <text:p text:style-name="P48"><text:span text:style-name="T1">Format JPG Grayscale :</text:span> En convertissant les partitions en niveaux de gris (8-bit), on réduit le poids des fichiers de <text:span text:style-name="T1">30% à 40%</text:span>.</text:p>
        </text:list-item>
        <text:list-item>
          <text:p text:style-name="P48"><text:span text:style-name="T1">Résolution 150 DPI :</text:span> Équilibre parfait entre lisibilité sur tablette et rapidité de transfert (moyenne de 150-200 Ko par page).</text:p>
        </text:list-item>
        <text:list-item>
          <text:p text:style-name="P48"><text:span text:style-name="T1">Impact :</text:span> Permet au routeur de servir les 50 clients sans congestion du canal Wi-Fi.</text:p>
        </text:list-item>
      </text:list>
      <text:h text:style-name="Heading_20_3" text:outline-level="3">4. Recommandations Infrastructure</text:h>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Table_20_Heading">Composant</text:p>
            </table:table-cell>
            <table:table-cell table:style-name="Tableau2.A1" office:value-type="string">
              <text:p text:style-name="Table_20_Heading">Statut</text:p>
            </table:table-cell>
            <table:table-cell table:style-name="Tableau2.A1" office:value-type="string">
              <text:p text:style-name="Table_20_Heading">Configuration conseillée</text:p>
            </table:table-cell>
          </table:table-row>
        </table:table-header-rows>
        <table:table-row>
          <table:table-cell table:style-name="Tableau2.A1" office:value-type="string">
            <text:p text:style-name="P9">CPU</text:p>
          </table:table-cell>
          <table:table-cell table:style-name="Tableau2.A1" office:value-type="string">
            <text:p text:style-name="Table_20_Contents">Protégé</text:p>
          </table:table-cell>
          <table:table-cell table:style-name="Tableau2.A1" office:value-type="string">
            <text:p text:style-name="Table_20_Contents">JPG pré-générés, pas de calcul à la volée.</text:p>
          </table:table-cell>
        </table:table-row>
        <table:table-row>
          <table:table-cell table:style-name="Tableau2.A1" office:value-type="string">
            <text:p text:style-name="P9">Mémoire Vive</text:p>
          </table:table-cell>
          <table:table-cell table:style-name="Tableau2.A1" office:value-type="string">
            <text:p text:style-name="Table_20_Contents">Critique</text:p>
          </table:table-cell>
          <table:table-cell table:style-name="Tableau2.A1" office:value-type="string">
            <text:p text:style-name="Table_20_Contents">Mode console (sans interface graphique) pour libérer la RAM.</text:p>
          </table:table-cell>
        </table:table-row>
        <table:table-row>
          <table:table-cell table:style-name="Tableau2.A1" office:value-type="string">
            <text:p text:style-name="P9">Réseau</text:p>
          </table:table-cell>
          <table:table-cell table:style-name="Tableau2.A1" office:value-type="string">
            <text:p text:style-name="Table_20_Contents">Sensible</text:p>
          </table:table-cell>
          <table:table-cell table:style-name="Tableau2.A1" office:value-type="string">
            <text:p text:style-name="Table_20_Contents"><text:span text:style-name="T1">Routeur Wi-Fi dédié</text:span> relié à la Pi en Ethernet (indispensable pour 50 clients).</text:p>
          </table:table-cell>
        </table:table-row>
        <table:table-row>
          <table:table-cell table:style-name="Tableau2.A1" office:value-type="string">
            <text:p text:style-name="P9">Logiciel</text:p>
          </table:table-cell>
          <table:table-cell table:style-name="Tableau2.A1" office:value-type="string">
            <text:p text:style-name="Table_20_Contents">Production</text:p>
          </table:table-cell>
          <table:table-cell table:style-name="Tableau2.A1" office:value-type="string">
            <text:p text:style-name="Table_20_Contents">Flask lancé via <text:span text:style-name="T1">Gunicorn</text:span> avec 3 ou 4 workers.</text:p>
          </table:table-cell>
        </table:table-row>
      </table:table>
      <text:p text:style-name="P14">Exporter vers Sheets</text:p>
      <text:p text:style-name="Horizontal_20_Line"/>
      <text:p text:style-name="Quotations"><text:soft-page-break/><text:span text:style-name="T1">Note de doc :</text:span> Cette architecture permet d'utiliser du matériel "obsolète" (type Raspberry Pi 2 ou 3) tout en offrant une réactivité professionnelle, car l'intelligence du système a été déplacée vers la préparation des données plutôt que vers leur distribution.</text:p>
      <text:h text:style-name="Heading_20_2" text:outline-level="2"/>
      <text:h text:style-name="P3" text:outline-level="2">Les annotations numériques</text:h>
      <text:p text:style-name="Text_20_body">C'est le "Saint Graal" du pupitre numérique, et tu as raison : une partition sans ratures, sans cercles autour des altérations accidentelles ou sans l'annotation "Attention au chef ici", ce n'est qu'à moitié une partition de musicien.</text:p>
      <text:p text:style-name="Text_20_body">Ajouter cette fonctionnalité sur un système qui doit tourner sur des tablettes potentiellement obsolètes (Android 4) et un serveur léger (Raspberry Pi) est un défi passionnant. Voici l'analyse de la situation et les pistes pour y arriver sans tout casser.</text:p>
      <text:p text:style-name="Horizontal_20_Line"/>
      <text:h text:style-name="Heading_20_3" text:outline-level="3">1. Pourquoi c'est complexe ?</text:h>
      <text:p text:style-name="Text_20_body">Le problème n'est pas de dessiner (le HTML5 <text:span text:style-name="Source_20_Text">Canvas</text:span> le fait très bien), c'est la <text:span text:style-name="T1">persistance</text:span> :</text:p>
      <text:list text:style-name="L27">
        <text:list-item>
          <text:p text:style-name="P49"><text:span text:style-name="T1">Le stockage :</text:span> Où garde-t-on les traits ? Sur la tablette (Local Storage) ou sur le serveur (Base de données) ?</text:p>
        </text:list-item>
        <text:list-item>
          <text:p text:style-name="P49"><text:span text:style-name="T1">L'alignement :</text:span> Si tu dessines sur un JPG de 150 DPI et que demain tu régénères la partition en 300 DPI, tes annotations seront décalées.</text:p>
        </text:list-item>
        <text:list-item>
          <text:p text:style-name="P49"><text:span text:style-name="T1">La performance :</text:span> Superposer une couche de dessin sur une image peut ralentir le défilement sur les vieux processeurs.</text:p>
        </text:list-item>
      </text:list>
      <text:h text:style-name="Heading_20_3" text:outline-level="3">2. La solution "Légère" (Vectorielle)</text:h>
      <text:p text:style-name="Text_20_body">Au lieu d'enregistrer une nouvelle image (ce qui pèserait lourd), on enregistre les <text:span text:style-name="T1">coordonnées des tracés</text:span>.</text:p>
      <text:list text:style-name="L28">
        <text:list-item>
          <text:p text:style-name="P50">On superpose un <text:span text:style-name="Source_20_Text">&lt;canvas&gt;</text:span> transparent exactement de la même taille que ton <text:span text:style-name="Source_20_Text">&lt;img&gt;</text:span> de partition.</text:p>
        </text:list-item>
        <text:list-item>
          <text:p text:style-name="P50">Le musicien dessine avec le doigt ou un stylet.</text:p>
        </text:list-item>
        <text:list-item>
          <text:p text:style-name="P50">On convertit le dessin en une liste de points (format JSON).</text:p>
          <text:list>
            <text:list-item>
              <text:p text:style-name="P50"><text:span text:style-name="T2">Exemple :</text:span> <text:span text:style-name="Source_20_Text">{ "action": "line", "color": "red", "points": [[10,10], [15,20], ... ] }</text:span></text:p>
            </text:list-item>
          </text:list>
        </text:list-item>
      </text:list>
      <text:h text:style-name="Heading_20_3" text:outline-level="3">3. Où stocker les annotations ?</text:h>
      <text:h text:style-name="Heading_20_4" text:outline-level="4">Option A : Stockage Local (Le plus simple)</text:h>
      <text:p text:style-name="Text_20_body">Les annotations restent sur la tablette (via <text:span text:style-name="Source_20_Text">localStorage</text:span> du navigateur).</text:p>
      <text:list text:style-name="L29">
        <text:list-item>
          <text:p text:style-name="P51"><text:span text:style-name="T1">Pros :</text:span> Zéro charge pour la Raspberry Pi. Pas besoin de gérer des comptes utilisateurs.</text:p>
        </text:list-item>
        <text:list-item>
          <text:p text:style-name="P51"><text:span text:style-name="T1">Cons :</text:span> Si le musicien change de tablette, il perd ses notes.</text:p>
        </text:list-item>
      </text:list>
      <text:h text:style-name="Heading_20_4" text:outline-level="4">Option B : Stockage Serveur (Le plus pro)</text:h>
      <text:p text:style-name="Text_20_body">On envoie le petit fichier JSON des annotations à Flask.</text:p>
      <text:list text:style-name="L30">
        <text:list-item>
          <text:p text:style-name="P52"><text:soft-page-break/><text:span text:style-name="T1">Pros :</text:span> Le musicien retrouve ses notes partout. Tu peux même imaginer que le chef d'orchestre envoie une annotation "tous les saxos" qui s'affiche chez tout le monde.</text:p>
        </text:list-item>
        <text:list-item>
          <text:p text:style-name="P52"><text:span text:style-name="T1">Cons :</text:span> Il faut créer une petite base de données (SQLite sur la Pi est parfait pour ça) et identifier chaque musicien (par instrument/nom).</text:p>
        </text:list-item>
      </text:list>
      <text:h text:style-name="Heading_20_3" text:outline-level="3">4. La bibliothèque magique : <text:span text:style-name="Source_20_Text">Fabric.js</text:span> ou <text:span text:style-name="Source_20_Text">Paper.js</text:span> ?</text:h>
      <text:p text:style-name="Text_20_body">Pour gérer le dessin facilement, même sur d'anciens navigateurs :</text:p>
      <text:list text:style-name="L31">
        <text:list-item>
          <text:p text:style-name="P53"><text:span text:style-name="T1">Fabric.js :</text:span> Très robuste, permet de manipuler les traits comme des objets. Un peu lourd pour Android 4.</text:p>
        </text:list-item>
        <text:list-item>
          <text:p text:style-name="P53"><text:span text:style-name="T1">Atrament.js :</text:span> Une bibliothèque minuscule (quelques Ko) spécialisée dans le dessin fluide "handwriting". Ce serait mon premier choix pour ton projet.</text:p>
        </text:list-item>
      </text:list>
      <text:p text:style-name="Horizontal_20_Line"/>
      <text:h text:style-name="Heading_20_3" text:outline-level="3">5. Une idée pour ta "Moulinette"</text:h>
      <text:p text:style-name="Text_20_body">Puisque tu as déjà une structure solide, tu pourrais ajouter un dossier <text:span text:style-name="Source_20_Text">annotations/</text:span> dans ton <text:span text:style-name="Source_20_Text">backNScoreData</text:span>. Chaque fichier serait nommé : <text:span text:style-name="Source_20_Text">NomDuMorceau_Instrument_Utilisateur.json</text:span>.</text:p>
      <text:p text:style-name="P10">Le flux de travail ressemblerait à ça :</text:p>
      <text:list text:style-name="L32">
        <text:list-item>
          <text:p text:style-name="P54">La tablette charge <text:span text:style-name="Source_20_Text">Clocks_Piano_p1.jpg</text:span>.</text:p>
        </text:list-item>
        <text:list-item>
          <text:p text:style-name="P54">Elle demande au serveur : "As-tu un JSON pour <text:span text:style-name="Source_20_Text">Clocks_Piano_p1</text:span> ?"</text:p>
        </text:list-item>
        <text:list-item>
          <text:p text:style-name="P54">Si oui, elle dessine les traits par-dessus l'image.</text:p>
        </text:list-item>
      </text:list>
      <text:p text:style-name="Standard"/>
      <text:h text:style-name="P11" text:outline-level="2">Imprimer des partitions</text:h>
      <text:p text:style-name="Text_20_body">C’est une question de survie pour tout musicien : "Et si la tablette tombe en panne de batterie en plein concert ?" L'impression est la roue de secours indispensable.</text:p>
      <text:p text:style-name="Text_20_body">Dans ton architecture actuelle, le défi est que tes partitions sont "éclatées" en plusieurs images JPG (<text:span text:style-name="Source_20_Text">_p1.jpg</text:span>, <text:span text:style-name="Source_20_Text">_p2.jpg</text:span>, etc.). Imprimer via le navigateur page par page serait un calvaire.</text:p>
      <text:p text:style-name="Text_20_body">Voici les trois stratégies pour offrir une fonction "Imprimer" propre :</text:p>
      <text:h text:style-name="Heading_20_3" text:outline-level="3">1. Le lien direct vers le PDF original (Le plus simple)</text:h>
      <text:p text:style-name="Text_20_body">Puisque ta moulinette garde les PDF sources à côté des JPG dans le dossier <text:span text:style-name="Source_20_Text">database</text:span>, la solution la plus efficace est de servir le PDF d'origine.</text:p>
      <text:list text:style-name="L33">
        <text:list-item>
          <text:p text:style-name="P55"><text:span text:style-name="T1">Le principe :</text:span> Dans ton interface, tu ajoutes un bouton "Imprimer (PDF)".</text:p>
        </text:list-item>
        <text:list-item>
          <text:p text:style-name="P55"><text:span text:style-name="T1">Côté Flask :</text:span> Tu crées une route qui va chercher le fichier <text:span text:style-name="Source_20_Text">.pdf</text:span> correspondant au morceau et à l'instrument actuel.</text:p>
        </text:list-item>
        <text:list-item>
          <text:p text:style-name="P55"><text:span text:style-name="T1">Action :</text:span> Le navigateur ouvre le PDF dans un nouvel onglet, et le musicien utilise la fonction d'impression native (<text:span text:style-name="Source_20_Text">Ctrl+P</text:span>). C'est propre, vectoriel et à la bonne taille.</text:p>
        </text:list-item>
      </text:list>
      <text:h text:style-name="Heading_20_3" text:outline-level="3">2. La fonction <text:span text:style-name="Source_20_Text">window.print()</text:span> (Le mode "Web")</text:h>
      <text:p text:style-name="Text_20_body">Si tu veux imprimer directement les JPG que l'utilisateur voit à l'écran, il faut utiliser le CSS. Le problème des images sur le web, c'est qu'elles ne respectent pas toujours les sauts de page.</text:p>
      <text:p text:style-name="Text_20_body"><text:span text:style-name="T1">L'astuce CSS pour ta doc :</text:span> Il faut créer une feuille de style dédiée à l'impression (<text:span text:style-name="Source_20_Text">@media print</text:span>) qui force chaque page de partition à occuper une feuille A4 entière.</text:p>
      <text:p text:style-name="P7">CSS</text:p>
      <text:p text:style-name="Preformatted_20_Text"><text:span text:style-name="Source_20_Text">@media print {</text:span></text:p>
      <text:p text:style-name="Preformatted_20_Text"><text:span text:style-name="Source_20_Text"><text:s text:c="4"/>body * { visibility: hidden; } /* Cache tout (menus, boutons) */</text:span></text:p>
      <text:p text:style-name="Preformatted_20_Text"><text:span text:style-name="Source_20_Text"><text:s text:c="4"/>.partition-container, .partition-container * {</text:span></text:p>
      <text:p text:style-name="Preformatted_20_Text"><text:span text:style-name="Source_20_Text"><text:s text:c="8"/>visibility: visible;</text:span></text:p>
      <text:p text:style-name="Preformatted_20_Text"><text:span text:style-name="Source_20_Text"><text:s text:c="4"/>}</text:span></text:p>
      <text:p text:style-name="Preformatted_20_Text"><text:span text:style-name="Source_20_Text"><text:s text:c="4"/>.page-jpg {</text:span></text:p>
      <text:p text:style-name="Preformatted_20_Text"><text:span text:style-name="Source_20_Text"><text:s text:c="8"/>page-break-after: always; /* Force le saut de page après chaque JPG */</text:span></text:p>
      <text:p text:style-name="Preformatted_20_Text"><text:span text:style-name="Source_20_Text"><text:s text:c="8"/>width: 100%;</text:span></text:p>
      <text:p text:style-name="Preformatted_20_Text"><text:span text:style-name="Source_20_Text"><text:s text:c="8"/>height: auto;</text:span></text:p>
      <text:p text:style-name="Preformatted_20_Text"><text:span text:style-name="Source_20_Text"><text:s text:c="4"/>}</text:span></text:p>
      <text:p text:style-name="P13"><text:span text:style-name="Source_20_Text">}</text:span></text:p>
      <text:h text:style-name="Heading_20_3" text:outline-level="3">3. La génération d'un PDF "à la volée" (Le mode expert)</text:h>
      <text:p text:style-name="Text_20_body">Si un jour tu n'as plus les PDF originaux (par exemple, si tu passes au "Tout JPG"), tu peux utiliser une bibliothèque Python comme <text:span text:style-name="T1">ReportLab</text:span> ou <text:span text:style-name="T1">img2pdf</text:span>.</text:p>
      <text:list text:style-name="L34">
        <text:list-item>
          <text:p text:style-name="P56"><text:span text:style-name="T1">Le flux :</text:span> L'utilisateur clique sur "Imprimer".</text:p>
        </text:list-item>
        <text:list-item>
          <text:p text:style-name="P56"><text:span text:style-name="T1">Le serveur :</text:span> Flask prend tous les JPG du morceau, les emballe dans un PDF temporaire.</text:p>
        </text:list-item>
        <text:list-item>
          <text:p text:style-name="P56"><text:span text:style-name="T1">Le résultat :</text:span> Le musicien télécharge un seul fichier PDF contenant toutes les pages, prêt à être imprimé.</text:p>
        </text:list-item>
        <text:list-item>
          <text:p text:style-name="P56"><text:soft-page-break/><text:span text:style-name="T1">Avantage :</text:span> <text:span text:style-name="Source_20_Text">img2pdf</text:span> est ultra-rapide et ne ré-encode pas les images (donc pas de perte de qualité).</text:p>
        </text:list-item>
      </text:list>
      <text:p text:style-name="Horizontal_20_Line"/>
      <text:h text:style-name="Heading_20_3" text:outline-level="3">Pourquoi l'Option 1 est ta meilleure amie ?</text:h>
      <text:p text:style-name="Text_20_body">Puisque tu es sur une <text:span text:style-name="T1">Raspberry Pi</text:span>, l'Option 1 (servir le PDF original) est la seule qui ne consomme <text:span text:style-name="T1">aucune ressource CPU</text:span>. C'est juste un transfert de fichier.</text:p>
      <text:p text:style-name="Text_20_body"><text:span text:style-name="T1">Petit conseil ergonomique :</text:span> Dans ton catalogue (<text:span text:style-name="Source_20_Text">db_tracks.json</text:span>), assure-toi d'avoir le chemin relatif vers le PDF. Sur l'interface, tu mets une petite icône "Imprimante". Quand le musicien clique, ça appelle : <text:span text:style-name="Source_20_Text">http://ton-serveur/download_pdf/chemin/vers/partition.pdf</text:span></text:p>
      <text:p text:style-name="Text_20_body">C'est simple, fiable, et ça rassure les musiciens qui aiment encore avoir du papier dans leur classeur "au cas où".</text:p>
      <text:p text:style-name="Standard"/>
      <text:h text:style-name="P12" text:outline-level="2">L’aspect hors-ligne</text:h>
      <text:p text:style-name="Text_20_body">C'est une excellente stratégie pour soulager ta Raspberry Pi et ton routeur Wi-Fi sur le long terme. En informatique, on appelle ça le <text:span text:style-name="T1">"Warm-up"</text:span> (la mise en cache progressive).</text:p>
      <text:p text:style-name="Text_20_body">Si à chaque répétition, les musiciens réutilisent les mêmes partitions, ton trafic réseau va tendre vers zéro, ne laissant passer que les signaux de synchronisation (le <text:span text:style-name="Source_20_Text">sync_check</text:span>).</text:p>
      <text:p text:style-name="Text_20_body">Voici comment structurer cette approche "Hors-ligne / Persistante" pour qu'elle reste fluide :</text:p>
      <text:h text:style-name="Heading_20_3" text:outline-level="3">1. Le mécanisme du Cache (Service Worker)</text:h>
      <text:p text:style-name="Text_20_body">Au lieu de coder une gestion complexe de fichiers dans le navigateur, on utilise un <text:span text:style-name="T1">Service Worker</text:span>. C'est un script qui agit comme un "douanier" entre la tablette et ton serveur.</text:p>
      <text:list text:style-name="L35">
        <text:list-item>
          <text:p text:style-name="P57"><text:span text:style-name="T1">Répétition n°1 :</text:span> Le musicien ouvre la partition. Le Service Worker voit passer les JPG, les laisse aller vers l'écran, mais en garde secrètement une copie dans le cache du navigateur.</text:p>
        </text:list-item>
        <text:list-item>
          <text:p text:style-name="P57"><text:span text:style-name="T1">Répétition n°2 :</text:span> Le musicien ouvre la même partition. Le Service Worker intercepte la requête, voit qu'il a déjà l'image en mémoire, et la donne instantanément à l'écran <text:span text:style-name="T1">sans même interroger la Raspberry Pi</text:span>.</text:p>
        </text:list-item>
      </text:list>
      <text:h text:style-name="Heading_20_3" text:outline-level="3">2. Le défi de la mise à jour (Cache Busting)</text:h>
      <text:p text:style-name="Text_20_body">C'est le seul risque : que se passe-t-il si tu as modifié une partition entre deux répétitions ? Si la tablette utilise sa version cachée, le musicien ne verra pas tes corrections.</text:p>
      <text:p text:style-name="Text_20_body">Pour régler ça, tu peux utiliser ton fichier <text:span text:style-name="Source_20_Text">db_tracks.json</text:span> comme référence.</text:p>
      <text:list text:style-name="L36">
        <text:list-item>
          <text:p text:style-name="P58"><text:span text:style-name="T1">Astuce :</text:span> Tu peux ajouter un "hash" ou la date de modification dans ton JSON. Si la date du serveur est plus récente que celle du cache, le Service Worker télécharge la nouvelle version. Sinon, il garde l'ancienne.</text:p>
        </text:list-item>
      </text:list>
      <text:h text:style-name="Heading_20_3" text:outline-level="3">3. Annotation et Persistance</text:h>
      <text:p text:style-name="Text_20_body">C'est là que ça devient vraiment puissant pour l'annotation. Si l'image est déjà stockée localement (en cache), tu peux l'associer à une couche d'annotation sans craindre que l'image disparaisse si le Wi-Fi coupe.</text:p>
      <text:h text:style-name="Heading_20_3" text:outline-level="3">4. Pourquoi c'est le "Combo Gagnant" pour une Harmonie ?</text:h>
      <text:list text:style-name="L37">
        <text:list-item>
          <text:p text:style-name="P59"><text:span text:style-name="T1">Décollage immédiat :</text:span> À la deuxième répétition, le chargement des morceaux est instantané. Plus d'attente "Tournez la page".</text:p>
        </text:list-item>
        <text:list-item>
          <text:p text:style-name="P59"><text:span text:style-name="T1">Stabilité :</text:span> Si le routeur Wi-Fi a un coup de mou ou si un musicien s'éloigne trop de la borne, sa partition reste affichée.</text:p>
        </text:list-item>
        <text:list-item>
          <text:p text:style-name="P59"><text:span text:style-name="T1">Économie de batterie :</text:span> Moins d'échanges Wi-Fi = plus d'autonomie pour les vieilles tablettes.</text:p>
        </text:list-item>
      </text:list>
      <text:p text:style-name="Horizontal_20_Line"/>
      <text:h text:style-name="Heading_20_3" text:outline-level="3"><text:soft-page-break/>Résumé de l'évolution de Back'n Score</text:h>
      <text:list text:style-name="L38">
        <text:list-item>
          <text:p text:style-name="P60"><text:span text:style-name="T1">Phase 1 (Actuelle) :</text:span> Tout est centralisé, la Pi envoie tout, tout le temps (Goulot d'étranglement Wi-Fi potentiel).</text:p>
        </text:list-item>
        <text:list-item>
          <text:p text:style-name="P60"><text:span text:style-name="T1">Phase 2 (Cachée) :</text:span> Ajout d'un Service Worker. Le réseau ne sert plus qu'à la nouveauté. La Pi respire, le système devient ultra-réactif.</text:p>
        </text:list-item>
        <text:list-item>
          <text:p text:style-name="P60"><text:span text:style-name="T1">Phase 3 (Annotée) :</text:span> Ajout d'une couche de dessin qui se superpose aux images déjà présentes dans le cache.</text:p>
        </text:list-item>
      </text:list>
      <text:p text:style-name="Text_20_body"/>
      <text:h text:style-name="P3" text:outline-level="2"><text:span text:style-name="Source_20_Text">serviceWorker</text:span></text:h>
      <text:h text:style-name="Heading_20_3" text:outline-level="3">1. Installation (dans ton fichier HTML principal)</text:h>
      <text:p text:style-name="Text_20_body">Ajoute ce petit script à la fin de ton <text:span text:style-name="Source_20_Text">index.html</text:span> (ou ton fichier JS principal). Il sert à "enregistrer" le douanier.</text:p>
      <text:p text:style-name="P7">JavaScript</text:p>
      <text:p text:style-name="Preformatted_20_Text"><text:span text:style-name="Source_20_Text">if ('serviceWorker' in navigator) {</text:span></text:p>
      <text:p text:style-name="Preformatted_20_Text"><text:span text:style-name="Source_20_Text"><text:s text:c="2"/>window.addEventListener('load', () =&gt; {</text:span></text:p>
      <text:p text:style-name="Preformatted_20_Text"><text:span text:style-name="Source_20_Text"><text:s text:c="4"/>navigator.serviceWorker.register('/sw.js')</text:span></text:p>
      <text:p text:style-name="Preformatted_20_Text"><text:span text:style-name="Source_20_Text"><text:s text:c="6"/>.then(reg =&gt; console.log('Service Worker enregistré !'))</text:span></text:p>
      <text:p text:style-name="Preformatted_20_Text"><text:span text:style-name="Source_20_Text"><text:s text:c="6"/>.catch(err =&gt; console.error('Erreur SW:', err));</text:span></text:p>
      <text:p text:style-name="Preformatted_20_Text"><text:span text:style-name="Source_20_Text"><text:s text:c="2"/>});</text:span></text:p>
      <text:p text:style-name="P13"><text:span text:style-name="Source_20_Text">}</text:span></text:p>
      <text:h text:style-name="Heading_20_3" text:outline-level="3">2. Le fichier <text:span text:style-name="Source_20_Text">sw.js</text:span> (à placer à la racine de ton serveur)</text:h>
      <text:p text:style-name="Text_20_body">Ce script utilise la stratégie <text:span text:style-name="T1">"Stale-while-revalidate"</text:span> : il sert l'image du cache immédiatement (pour la vitesse), mais vérifie quand même discrètement sur le serveur s'il y a une mise à jour.</text:p>
      <text:p text:style-name="P7">JavaScript</text:p>
      <text:p text:style-name="Preformatted_20_Text"><text:span text:style-name="Source_20_Text">const CACHE_NAME = 'backnscore-v1';</text:span></text:p>
      <text:p text:style-name="Preformatted_20_Text"/>
      <text:p text:style-name="Preformatted_20_Text"><text:span text:style-name="Source_20_Text">// On intercepte les requêtes</text:span></text:p>
      <text:p text:style-name="Preformatted_20_Text"><text:span text:style-name="Source_20_Text">self.addEventListener('fetch', (event) =&gt; {</text:span></text:p>
      <text:p text:style-name="Preformatted_20_Text"><text:span text:style-name="Source_20_Text"><text:s text:c="2"/>// On ne met en cache que les images (partitions)</text:span></text:p>
      <text:p text:style-name="Preformatted_20_Text"><text:span text:style-name="Source_20_Text"><text:s text:c="2"/>if (event.request.url.includes('.jpg')) {</text:span></text:p>
      <text:p text:style-name="Preformatted_20_Text"><text:span text:style-name="Source_20_Text"><text:s text:c="4"/>event.respondWith(</text:span></text:p>
      <text:p text:style-name="Preformatted_20_Text"><text:span text:style-name="Source_20_Text"><text:s text:c="6"/>caches.open(CACHE_NAME).then((cache) =&gt; {</text:span></text:p>
      <text:p text:style-name="Preformatted_20_Text"><text:span text:style-name="Source_20_Text"><text:s text:c="8"/>return cache.match(event.request).then((response) =&gt; {</text:span></text:p>
      <text:p text:style-name="Preformatted_20_Text"><text:span text:style-name="Source_20_Text"><text:s text:c="10"/>// On télécharge la version du serveur en arrière-plan</text:span></text:p>
      <text:p text:style-name="Preformatted_20_Text"><text:span text:style-name="Source_20_Text"><text:s text:c="10"/>const fetchPromise = fetch(event.request).then((networkResponse) =&gt; {</text:span></text:p>
      <text:p text:style-name="Preformatted_20_Text"><text:span text:style-name="Source_20_Text"><text:s text:c="12"/>cache.put(event.request, networkResponse.clone());</text:span></text:p>
      <text:p text:style-name="Preformatted_20_Text"><text:span text:style-name="Source_20_Text"><text:s text:c="12"/>return networkResponse;</text:span></text:p>
      <text:p text:style-name="Preformatted_20_Text"><text:span text:style-name="Source_20_Text"><text:s text:c="10"/>});</text:span></text:p>
      <text:p text:style-name="Preformatted_20_Text"><text:span text:style-name="Source_20_Text"><text:s text:c="10"/>// On renvoie la version du cache (si elle existe) ou celle du réseau</text:span></text:p>
      <text:p text:style-name="Preformatted_20_Text"><text:span text:style-name="Source_20_Text"><text:s text:c="10"/>return response || fetchPromise;</text:span></text:p>
      <text:p text:style-name="Preformatted_20_Text"><text:span text:style-name="Source_20_Text"><text:s text:c="8"/>});</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13"><text:span text:style-name="Source_20_Text">});</text:span></text:p>
      <text:p text:style-name="Horizontal_20_Line"/>
      <text:h text:style-name="Heading_20_3" text:outline-level="3">Pourquoi c'est parfait pour ton projet :</text:h>
      <text:list text:style-name="L39">
        <text:list-item>
          <text:p text:style-name="P61"><text:span text:style-name="T1">Zéro configuration côté Python :</text:span> Tu n'as pas besoin de toucher à ton code Flask.</text:p>
        </text:list-item>
        <text:list-item>
          <text:p text:style-name="P61"><text:span text:style-name="T1">Vitesse foudroyante :</text:span> Dès la deuxième consultation, l'image s'affiche en quelques millisecondes, même si la Raspberry Pi est sous l'eau.</text:p>
        </text:list-item>
        <text:list-item>
          <text:p text:style-name="P61"><text:span text:style-name="T1">Mode Hors-ligne :</text:span> Si le musicien perd le Wi-Fi, les partitions déjà vues restent affichées.</text:p>
        </text:list-item>
      </text:list>
      <text:h text:style-name="Heading_20_3" text:outline-level="3"><text:soft-page-break/>Un point de vigilance sur Android 4</text:h>
      <text:p text:style-name="Text_20_body">Les Service Workers ont été introduits vers 2014-2015.</text:p>
      <text:list text:style-name="L40">
        <text:list-item>
          <text:p text:style-name="P62">Si tes tablettes utilisent <text:span text:style-name="T1">Chrome</text:span> (version 40+) ou le navigateur natif d'<text:span text:style-name="T1">Android 4.4</text:span>, ça fonctionnera.</text:p>
        </text:list-item>
        <text:list-item>
          <text:p text:style-name="P62">Pour les versions plus anciennes (Android 4.1 ou 4.2), le script sera simplement ignoré : le site fonctionnera toujours, mais sans le cache (ils resteront en mode "tout réseau").</text:p>
        </text:list-item>
      </text:list>
      <text:p text:style-name="Text_20_body"/>
      <text:p text:style-name="P6"/>
      <text:h text:style-name="Heading_20_2" text:outline-level="2">Compatibilité vieilles tablettes</text:h>
      <text:p text:style-name="P15">Bien vu ! C'est le réflexe typique du développeur qui jongle avec du matériel ancien : <text:span text:style-name="T1">le JavaScript moderne (ES6+) ne passera pas</text:span> sur les moteurs de rendu des vieux Android 4 (Webkit version 2012-2013).</text:p>
      <text:section text:style-name="Sect1" text:name="model-response-message-contentr_d8d9cc0d4ec167e6">
        <text:p text:style-name="Text_20_body">Pour que ton Service Worker et tes scripts fonctionnent sur ces tablettes, il faut revenir au <text:span text:style-name="T1">JavaScript "Old School" (ES5)</text:span>.</text:p>
        <text:p text:style-name="Text_20_body">Voici la version compatible (adieu <text:span text:style-name="Source_20_Text">const</text:span>, <text:span text:style-name="Source_20_Text">let</text:span>, et les fonctions fléchées <text:span text:style-name="Source_20_Text">=&gt;</text:span>) :</text:p>
        <text:h text:style-name="Heading_20_3" text:outline-level="3">1. Installation compatible (dans ton HTML)</text:h>
        <text:p text:style-name="P7">JavaScript</text:p>
        <text:p text:style-name="Preformatted_20_Text"><text:span text:style-name="Source_20_Text">if ('serviceWorker' in navigator) {</text:span></text:p>
        <text:p text:style-name="Preformatted_20_Text"><text:span text:style-name="Source_20_Text"><text:s text:c="4"/>window.addEventListener('load', function() {</text:span></text:p>
        <text:p text:style-name="Preformatted_20_Text"><text:span text:style-name="Source_20_Text"><text:s text:c="8"/>navigator.serviceWorker.register('/sw.js')</text:span></text:p>
        <text:p text:style-name="Preformatted_20_Text"><text:span text:style-name="Source_20_Text"><text:s text:c="12"/>.then(function(reg) {</text:span></text:p>
        <text:p text:style-name="Preformatted_20_Text"><text:span text:style-name="Source_20_Text"><text:s text:c="16"/>console.log('Service Worker enregistré !');</text:span></text:p>
        <text:p text:style-name="Preformatted_20_Text"><text:span text:style-name="Source_20_Text"><text:s text:c="12"/>})</text:span></text:p>
        <text:p text:style-name="Preformatted_20_Text"><text:span text:style-name="Source_20_Text"><text:s text:c="12"/>.catch(function(err) {</text:span></text:p>
        <text:p text:style-name="Preformatted_20_Text"><text:span text:style-name="Source_20_Text"><text:s text:c="16"/>console.error('Erreur SW:', err);</text:span></text:p>
        <text:p text:style-name="Preformatted_20_Text"><text:span text:style-name="Source_20_Text"><text:s text:c="12"/>});</text:span></text:p>
        <text:p text:style-name="Preformatted_20_Text"><text:span text:style-name="Source_20_Text"><text:s text:c="4"/>});</text:span></text:p>
        <text:p text:style-name="P13"><text:span text:style-name="Source_20_Text">}</text:span></text:p>
        <text:h text:style-name="Heading_20_3" text:outline-level="3">2. Le fichier <text:span text:style-name="Source_20_Text">sw.js</text:span> (Version ES5)</text:h>
        <text:p text:style-name="P7">JavaScript</text:p>
        <text:p text:style-name="Preformatted_20_Text"><text:span text:style-name="Source_20_Text">var CACHE_NAME = 'backnscore-v1';</text:span></text:p>
        <text:p text:style-name="Preformatted_20_Text"/>
        <text:p text:style-name="Preformatted_20_Text"><text:span text:style-name="Source_20_Text">self.addEventListener('fetch', function(event) {</text:span></text:p>
        <text:p text:style-name="Preformatted_20_Text"><text:span text:style-name="Source_20_Text"><text:s text:c="4"/>if (event.request.url.indexOf('.jpg') !== -1) {</text:span></text:p>
        <text:p text:style-name="Preformatted_20_Text"><text:span text:style-name="Source_20_Text"><text:s text:c="8"/>event.respondWith(</text:span></text:p>
        <text:p text:style-name="Preformatted_20_Text"><text:span text:style-name="Source_20_Text"><text:s text:c="12"/>caches.open(CACHE_NAME).then(function(cache) {</text:span></text:p>
        <text:p text:style-name="Preformatted_20_Text"><text:span text:style-name="Source_20_Text"><text:s text:c="16"/>return cache.match(event.request).then(function(response) {</text:span></text:p>
        <text:p text:style-name="Preformatted_20_Text"><text:span text:style-name="Source_20_Text"><text:s text:c="20"/>var fetchPromise = fetch(event.request).then(function(networkResponse) {</text:span></text:p>
        <text:p text:style-name="Preformatted_20_Text"><text:span text:style-name="Source_20_Text"><text:s text:c="24"/>cache.put(event.request, networkResponse.clone());</text:span></text:p>
        <text:p text:style-name="Preformatted_20_Text"><text:span text:style-name="Source_20_Text"><text:s text:c="24"/>return networkResponse;</text:span></text:p>
        <text:p text:style-name="Preformatted_20_Text"><text:span text:style-name="Source_20_Text"><text:s text:c="20"/>});</text:span></text:p>
        <text:p text:style-name="Preformatted_20_Text"><text:span text:style-name="Source_20_Text"><text:s text:c="20"/>return response || fetchPromise;</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13"><text:span text:style-name="Source_20_Text">});</text:span></text:p>
        <text:h text:style-name="Heading_20_3" text:outline-level="3">Pourquoi c'est important ?</text:h>
        <text:list text:style-name="L41">
          <text:list-item>
            <text:p text:style-name="P63"><text:span text:style-name="Source_20_Text"><text:span text:style-name="T1">var</text:span></text:span><text:span text:style-name="T1"> au lieu de </text:span><text:span text:style-name="Source_20_Text"><text:span text:style-name="T1">const/let</text:span></text:span><text:span text:style-name="T1"> :</text:span> Android 4 ne comprend pas la portée de bloc du ES6.</text:p>
          </text:list-item>
          <text:list-item>
            <text:p text:style-name="P63"><text:span text:style-name="Source_20_Text"><text:span text:style-name="T1">function()</text:span></text:span><text:span text:style-name="T1"> au lieu de </text:span><text:span text:style-name="Source_20_Text"><text:span text:style-name="T1">=&gt;</text:span></text:span><text:span text:style-name="T1"> :</text:span> Les fonctions fléchées provoquent une erreur de syntaxe immédiate qui bloque tout le script sur les vieux navigateurs.</text:p>
          </text:list-item>
          <text:list-item>
            <text:p text:style-name="P63"><text:soft-page-break/><text:span text:style-name="Source_20_Text"><text:span text:style-name="T1">indexOf</text:span></text:span><text:span text:style-name="T1"> au lieu de </text:span><text:span text:style-name="Source_20_Text"><text:span text:style-name="T1">includes</text:span></text:span><text:span text:style-name="T1"> :</text:span> <text:span text:style-name="Source_20_Text">.includes()</text:span> est arrivé bien après. Pour vérifier une chaîne de caractères en 2013, on utilisait <text:span text:style-name="Source_20_Text">indexOf() !== -1</text:span>.</text:p>
          </text:list-item>
        </text:list>
        <text:h text:style-name="Heading_20_3" text:outline-level="3">Un dernier conseil pour l'obsolescence :</text:h>
        <text:p text:style-name="Text_20_body">Si tu écris beaucoup de JavaScript pour l'interface (gestion du clic, zoom, etc.), évite aussi :</text:p>
        <text:list text:style-name="L42">
          <text:list-item>
            <text:p text:style-name="P64">Les <text:span text:style-name="T1">Template Literals</text:span> (les guillemets inversés <text:span text:style-name="Source_20_Text">`text ${var}`</text:span>). Utilise la concaténation classique : <text:span text:style-name="Source_20_Text">'text ' + var</text:span>.</text:p>
          </text:list-item>
          <text:list-item>
            <text:p text:style-name="P64">Les <text:span text:style-name="T1">Promises</text:span> : Si tes tablettes sont vraiment très vieilles (Android 4.1/4.2), il se peut que <text:span text:style-name="Source_20_Text">fetch</text:span> et <text:span text:style-name="Source_20_Text">Promise</text:span> ne soient pas supportés nativement. Dans ce cas, le Service Worker ne s'activera tout simplement pas, mais ton site continuera de fonctionner en mode "normal" via les requêtes classiques.</text:p>
          </text:list-item>
        </text:list>
        <text:p text:style-name="Text_20_body">C'est là qu'on voit que ton projet est un vrai défi : faire du moderne avec du vieux ! Est-ce que tu utilises un outil comme Babel pour traduire ton code ou tu écris tout à la main en mode compatible ?</text:p>
      </text:section>
      <text:p text:style-name="Text_20_body"/>
      <text:h text:style-name="P3" text:outline-level="2">Une page administrateur</text:h>
      <text:p text:style-name="P8">j'ai prévu une page admin pour back'n score. il s'agirait de maintenir la base de tracks. ça te parait faisable et raisonnable? </text:p>
      <text:section text:style-name="Sect1" text:name="model-response-message-contentr_3296301a47e3c1e4">
        <text:p text:style-name="P7">C'est non seulement <text:span text:style-name="T1">faisable</text:span>, mais c'est l'étape <text:span text:style-name="T1">indispensable</text:span> pour que ton projet passe d'un prototype figé à un véritable outil vivant. Gérer une base de données de morceaux (tracks) à la main dans des fichiers JSON, c'est sympa au début, mais ça devient vite l'enfer quand la bibliothèque s'agrandit.</text:p>
        <text:p text:style-name="Text_20_body">Voici pourquoi c'est raisonnable et ce qu'il faut surveiller pour que ça reste simple à coder :</text:p>
        <text:h text:style-name="Heading_20_3" text:outline-level="3">1. La faisabilité technique</text:h>
        <text:p text:style-name="Text_20_body">Si tu as déjà la structure <text:span text:style-name="Source_20_Text">DATA_TRACKS</text:span> que l'on a manipulée dans <text:span text:style-name="Source_20_Text">tree.js</text:span>, tu as déjà le plus dur : le schéma de données. Une page admin pour ça, c'est essentiellement un <text:span text:style-name="T1">CRUD</text:span> (Create, Read, Update, Delete) :</text:p>
        <text:list text:style-name="L43">
          <text:list-item>
            <text:p text:style-name="P65"><text:span text:style-name="T1">Create/Update :</text:span> Un formulaire pour entrer le titre, le chemin du fichier (location), le tempo, le style, etc.</text:p>
          </text:list-item>
          <text:list-item>
            <text:p text:style-name="P65"><text:span text:style-name="T1">Read :</text:span> Un tableau récapitulatif pour voir tout ce qui est en base.</text:p>
          </text:list-item>
          <text:list-item>
            <text:p text:style-name="P65"><text:span text:style-name="T1">Delete :</text:span> Un bouton pour supprimer une entrée (avec une confirmation, pour éviter les drames).</text:p>
          </text:list-item>
        </text:list>
        <text:h text:style-name="Heading_20_3" text:outline-level="3">2. Le vrai défi : L'upload des fichiers</text:h>
        <text:p text:style-name="Text_20_body">C'est là que ça devient sérieux. Une page admin "propre" ne doit pas juste enregistrer un nom dans une base de données, elle devrait idéalement gérer l'envoi du fichier MP3 ou WAV sur le serveur.</text:p>
        <text:list text:style-name="L44">
          <text:list-item>
            <text:p text:style-name="P66"><text:span text:style-name="T1">Est-ce raisonnable ?</text:span> Oui, si ton serveur (Node.js, PHP, Python ?) est déjà configuré pour l'upload.</text:p>
          </text:list-item>
          <text:list-item>
            <text:p text:style-name="P66"><text:span text:style-name="T1">L'alternative "light" :</text:span> Tu uploades tes fichiers par FTP comme d'habitude, et l'admin ne sert qu'à mettre à jour le fichier <text:span text:style-name="Source_20_Text">tracks.json</text:span> ou la base SQL. C'est beaucoup plus simple à coder.</text:p>
          </text:list-item>
        </text:list>
        <text:h text:style-name="Heading_20_3" text:outline-level="3">3. La sécurité (Le point critique)</text:h>
        <text:p text:style-name="Text_20_body">Dès que tu crées une page qui peut modifier ou supprimer des données :</text:p>
        <text:list text:style-name="L45">
          <text:list-item>
            <text:p text:style-name="P67">Il faut un <text:span text:style-name="T1">accès restreint</text:span> (htaccess, token, ou session login).</text:p>
          </text:list-item>
          <text:list-item>
            <text:p text:style-name="P67">Il faut valider les entrées pour éviter qu'un titre de morceau bizarre ne casse ton affichage dans le <text:span text:style-name="Source_20_Text">tree.js</text:span>.</text:p>
          </text:list-item>
        </text:list>
        <text:h text:style-name="Heading_20_3" text:outline-level="3">4. L'avantage pour ton workflow</text:h>
        <text:p text:style-name="Text_20_body">Une fois l'admin en place, tu pourras :</text:p>
        <text:list text:style-name="L46">
          <text:list-item>
            <text:p text:style-name="P68">Ajouter un morceau en plein milieu d'une répète depuis ton téléphone.</text:p>
          </text:list-item>
          <text:list-item>
            <text:p text:style-name="P68">Corriger une faute de frappe dans un titre sans ouvrir ton éditeur de code.</text:p>
          </text:list-item>
          <text:list-item>
            <text:p text:style-name="P68"><text:soft-page-break/>Réorganiser tes dossiers (le fameux <text:span text:style-name="Source_20_Text">location</text:span>) visuellement.</text:p>
          </text:list-item>
        </text:list>
        <text:p text:style-name="Text_20_body"><text:span text:style-name="T1">Ma recommandation :</text:span> Commence par une page admin minimaliste qui ne gère que les <text:span text:style-name="T1">métadonnées</text:span> (les textes et les chemins). Si ça fonctionne bien, tu ajouteras l'upload de fichiers plus tard.</text:p>
        <text:p text:style-name="Text_20_body">Tu as déjà une idée de la techno que tu veux utiliser pour le backend de cette page (PHP, Node, ou simple modification de fichier local) ?</text:p>
      </text:section>
      <text:p text:style-name="Text_20_body"/>
      <text:h text:style-name="P3" text:outline-level="2">Tablettes, pédales...</text:h>
      <text:section text:style-name="Sect1" text:name="model-response-message-contentr_7da21a680a43c3ed">
        <text:p text:style-name="P7"><text:span text:style-name="T3">50 musiciens en train d’essayer d’appairer leurs tablettes et pédales en même temps… </text:span>C'est le scénario catastrophe redouté par tous les régisseurs d'orchestre ! Si 50 musiciens lancent l'appairage Bluetooth en même temps dans la même pièce, voici précisément ce qui risque d'arriver :</text:p>
        <text:h text:style-name="Heading_20_3" text:outline-level="3">1. La "Guerre des Noms" (Confusion totale)</text:h>
        <text:p text:style-name="Text_20_body">La plupart des pédales (surtout si vous achetez 50 fois le même modèle) sortent d'usine avec le même nom réseau, par exemple <text:span text:style-name="Source_20_Text">"AirTurn-v2"</text:span> ou <text:span text:style-name="Source_20_Text">"Bluetooth Pedal"</text:span>.</text:p>
        <text:list text:style-name="L47">
          <text:list-item>
            <text:p text:style-name="P70"><text:span text:style-name="T1">Le problème :</text:span> Chaque tablette va afficher une liste de 50 périphériques nommés exactement de la même façon.</text:p>
          </text:list-item>
          <text:list-item>
            <text:p text:style-name="P70"><text:span text:style-name="T1">La conséquence :</text:span> Le violoniste A va tenter de s'appairer à la pédale du violoniste B par erreur. S'il réussit, le violoniste A tournera les pages de son collègue à distance, sans comprendre pourquoi.</text:p>
          </text:list-item>
        </text:list>
        <text:h text:style-name="Heading_20_3" text:outline-level="3">2. La saturation de la bande 2,4 GHz</text:h>
        <text:p text:style-name="Text_20_body">Le Bluetooth partage la même fréquence que le Wi-Fi (2,4 GHz).</text:p>
        <text:list text:style-name="L48">
          <text:list-item>
            <text:p text:style-name="P71"><text:span text:style-name="T1">Le problème :</text:span> Bien que le Bluetooth soit conçu pour "sauter" d'une fréquence à l'autre pour éviter les interférences, 50 signaux qui cherchent à s'identifier simultanément créent un "bruit" radio énorme.</text:p>
          </text:list-item>
          <text:list-item>
            <text:p text:style-name="P71"><text:span text:style-name="T1">La conséquence :</text:span> Des échecs de connexion ("Impossible d'associer l'appareil") ou des latences (la page tourne 2 secondes après l'appui).</text:p>
          </text:list-item>
        </text:list>
        <text:h text:style-name="Heading_20_3" text:outline-level="3">3. La solution "Militaire" pour éviter le chaos</text:h>
        <text:p text:style-name="Text_20_body">Pour que cela fonctionne avec un grand ensemble, il ne faut <text:span text:style-name="T1">jamais</text:span> faire un appairage collectif. Voici la procédure à suivre :</text:p>
        <text:list text:style-name="L49">
          <text:list-item>
            <text:p text:style-name="P72"><text:span text:style-name="T1">L'identification physique :</text:span> Chaque musicien doit coller une étiquette sur sa pédale avec un numéro unique (ex: Pédale 01, Pédale 02).</text:p>
          </text:list-item>
          <text:list-item>
            <text:p text:style-name="P72"><text:span text:style-name="T1">L'appairage séquentiel :</text:span> On procède pupitre par pupitre (les premiers violons, puis les seconds, etc.).</text:p>
            <text:list>
              <text:list-item>
                <text:p text:style-name="P72">Le musicien active le Bluetooth, appaire sa pédale, et <text:span text:style-name="T1">une fois que c'est lié, c'est fini</text:span>. Une connexion Bluetooth établie est "invisible" pour les autres tablettes qui cherchent encore.</text:p>
              </text:list-item>
            </text:list>
          </text:list-item>
          <text:list-item>
            <text:p text:style-name="P72"><text:span text:style-name="T1">Le renommage immédiat :</text:span> Une fois appairé, dans les réglages Bluetooth de la tablette, il faut cliquer sur l'engrenage à côté du nom et renommer la pédale ("Ped-01-Jean"). Cela évite que la tablette ne se reconnecte à la mauvaise pédale le lendemain si la connexion est perdue.</text:p>
          </text:list-item>
        </text:list>
        <text:h text:style-name="Heading_20_3" text:outline-level="3">Le point rassurant</text:h>
        <text:p text:style-name="Text_20_body">Une fois que les 50 tablettes sont <text:span text:style-name="T1">déjà appairées</text:span> à leur propre pédale (ce qu'on appelle le "Pairing"), elles se reconnaissent mutuellement en une fraction de seconde au démarrage. Le jour du <text:soft-page-break/>concert, quand tout le monde allume son matériel, il n'y a plus de recherche globale : chaque tablette "saute" directement sur sa pédale attitrée.</text:p>
        <text:p text:style-name="Text_20_body"><text:span text:style-name="T1">En résumé :</text:span> L'appairage initial à 50 est un enfer, mais l'utilisation quotidienne à 50 est très stable. 🐢orchestra-ready!</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28T08:35:04.362270444</meta:creation-date>
    <dc:date>2026-05-03T23:03:57.989922212</dc:date>
    <meta:editing-duration>PT19H24M57S</meta:editing-duration>
    <meta:editing-cycles>13</meta:editing-cycles>
    <meta:generator>LibreOffice/24.2.7.2$Linux_X86_64 LibreOffice_project/420$Build-2</meta:generator>
    <meta:document-statistic meta:table-count="2" meta:image-count="0" meta:object-count="0" meta:page-count="27" meta:paragraph-count="424" meta:word-count="5468" meta:character-count="33842" meta:non-whitespace-character-count="28395"/>
  </office:meta>
</office:document-meta>
</file>