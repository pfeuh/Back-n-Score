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DejaVu Sans Mono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weight="bold"/>
    </style:style>
    <style:style style:name="P7" style:family="paragraph" style:parent-style-name="Text_20_body" style:list-style-name="L8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hier des Charges Technique : Back'n Score</text:h>
      <text:h text:style-name="Heading_20_3" text:outline-level="3">1. Architecture Globale</text:h>
      <text:list text:style-name="L1">
        <text:list-item>
          <text:p text:style-name="P4"><text:span text:style-name="T1">Philosophie :</text:span> Conception <text:span text:style-name="T1">KISS</text:span> (<text:span text:style-name="T2">Keep It Simple, Stupid</text:span>), privilégiant la robustesse et la compatibilité avec du matériel ancien (Android 4).</text:p>
        </text:list-item>
        <text:list-item>
          <text:p text:style-name="P4"><text:span text:style-name="T1">Modèle :</text:span> Client-Serveur centralisé sur un Raspberry Pi.</text:p>
        </text:list-item>
        <text:list-item>
          <text:p text:style-name="P4"><text:span text:style-name="T1">Client Unique :</text:span> Une seule application web (Universal App) pour tous les utilisateurs. Les droits d'administration (Chef) sont débloqués par authentification.</text:p>
        </text:list-item>
      </text:list>
      <text:h text:style-name="Heading_20_3" text:outline-level="3">2. Spécifications du Serveur (La "Salle des Machines")</text:h>
      <text:list text:style-name="L2">
        <text:list-item>
          <text:p text:style-name="P5"><text:span text:style-name="T1">Environnement :</text:span> Python + Flask.</text:p>
        </text:list-item>
        <text:list-item>
          <text:p text:style-name="P5"><text:span text:style-name="T1">Rôle :</text:span> * Servir les fichiers statiques (HTML, CSS, JS, JSON).</text:p>
          <text:list>
            <text:list-item>
              <text:p text:style-name="P5">Héberger les ressources (Images des partitions PNG/JPG).</text:p>
            </text:list-item>
            <text:list-item>
              <text:p text:style-name="P5">Gérer l'état de synchronisation en mémoire vive (Variable globale).</text:p>
            </text:list-item>
          </text:list>
        </text:list-item>
        <text:list-item>
          <text:p text:style-name="P6">API Minimaliste :</text:p>
          <text:list>
            <text:list-item>
              <text:p text:style-name="P5"><text:span text:style-name="Source_20_Text">GET /sync_check</text:span> : Renvoie le morceau actuel et son horodatage.</text:p>
            </text:list-item>
            <text:list-item>
              <text:p text:style-name="P5"><text:span text:style-name="Source_20_Text">POST /sync_push</text:span> : Met à jour le morceau actuel (réservé au détenteur du code).</text:p>
            </text:list-item>
          </text:list>
        </text:list-item>
      </text:list>
      <text:h text:style-name="Heading_20_3" text:outline-level="3">3. Système de Synchronisation (Le "Tableau Noir")</text:h>
      <text:list text:style-name="L3">
        <text:list-item>
          <text:p text:style-name="P8"><text:span text:style-name="T1">Méthode :</text:span> <text:span text:style-name="T1">Polling AJAX</text:span> (et non Broadcast/WebSockets).</text:p>
        </text:list-item>
        <text:list-item>
          <text:p text:style-name="P8"><text:span text:style-name="T1">Fréquence :</text:span> Toutes les 2 secondes (configurable).</text:p>
        </text:list-item>
        <text:list-item>
          <text:p text:style-name="P8"><text:span text:style-name="T1">Résilience :</text:span> En cas de coupure Wi-Fi, la tablette tente de se reconnecter automatiquement à chaque cycle. Dès le retour du réseau, elle se cale sur le morceau enregistré sur le serveur.</text:p>
        </text:list-item>
        <text:list-item>
          <text:p text:style-name="P8"><text:span text:style-name="T1">Logique de chargement :</text:span> Chaque client est autonome. Le serveur impose le <text:span text:style-name="T1">morceau</text:span>, mais le client choisit sa <text:span text:style-name="T1">partition</text:span> (via ses variables locales : Instrument, Voix, mode Solo).</text:p>
        </text:list-item>
      </text:list>
      <text:h text:style-name="Heading_20_3" text:outline-level="3">4. Gestion des Droits &amp; Sessions</text:h>
      <text:list text:style-name="L4">
        <text:list-item>
          <text:p text:style-name="P9"><text:span text:style-name="T1">Accès Chef :</text:span> Protection par code numérique simple.</text:p>
        </text:list-item>
        <text:list-item>
          <text:p text:style-name="P9"><text:span text:style-name="T1">Session "Baloche" :</text:span> Une fois le code saisi, le droit d'administration est stocké dans le <text:span text:style-name="Source_20_Text">localStorage</text:span> du navigateur.</text:p>
        </text:list-item>
        <text:list-item>
          <text:p text:style-name="P9"><text:span text:style-name="T1">Validité :</text:span> Durée configurable (par défaut 12 heures) pour couvrir une balance et une prestation complète sans nouvelle saisie.</text:p>
        </text:list-item>
      </text:list>
      <text:h text:style-name="Heading_20_3" text:outline-level="3">5. Contraintes Matérielles &amp; Formats</text:h>
      <text:list text:style-name="L5">
        <text:list-item>
          <text:p text:style-name="P10"><text:span text:style-name="T1">Compatibilité :</text:span> Optimisé pour Android 4 (moteur de rendu Legacy).</text:p>
        </text:list-item>
        <text:list-item>
          <text:p text:style-name="P10"><text:span text:style-name="T1">Interface :</text:span> Mise en page par <text:span text:style-name="Source_20_Text">Floats</text:span> et <text:span text:style-name="Source_20_Text">inline-block</text:span> (pas de Flexbox complexe) pour éviter les bugs d'affichage.</text:p>
        </text:list-item>
        <text:list-item>
          <text:p text:style-name="P10"><text:soft-page-break/><text:span text:style-name="T1">Formats d'images :</text:span> PNG ou JPG uniquement (le PDF est proscrit pour garantir la fluidité sur les processeurs anciens).</text:p>
        </text:list-item>
        <text:list-item>
          <text:p text:style-name="P10"><text:span text:style-name="T1">Ergonomie :</text:span> Boutons de taille "tactile" (minimum 44px) pour une manipulation aisée avec un instrument en main.</text:p>
        </text:list-item>
      </text:list>
      <text:p text:style-name="Horizontal_20_Line"/>
      <text:h text:style-name="Heading_20_3" text:outline-level="3">Pourquoi ce choix est le bon ?</text:h>
      <text:p text:style-name="Quotations">Ce système transforme un point faible (vieux matériel) en force (simplicité extrême). En utilisant des technologies web standards et éprouvées, on garantit que l'application ne "plantera" pas à cause d'une fuite de mémoire ou d'une perte de connexion Wi-Fi, ce qui est la priorité absolue lors d'une prestation en direct.</text:p>
      <text:p text:style-name="Standard"/>
      <text:p text:style-name="P1">/BackNScore</text:p>
      <text:p text:style-name="P2">├── server.py <text:s text:c="11"/># Dispatcher Flask (Port 8000)</text:p>
      <text:p text:style-name="P2">├── web/ <text:s text:c="16"/># index.html, CSS, JS</text:p>
      <text:p text:style-name="P2">├── server_data/ <text:s text:c="8"/># db_tracks.json</text:p>
      <text:p text:style-name="P2">├── database/ <text:s text:c="11"/># Dossiers de partitions</text:p>
      <text:p text:style-name="P2">└── scripts/ <text:s text:c="12"/># Logique Python (getScoreName.py)</text:p>
      <text:p text:style-name="Standard"/>
      <text:p text:style-name="Standard"/>
      <text:h text:style-name="P3" text:outline-level="2">📄 Cahier des Charges : Back'n Score V1.0</text:h>
      <text:h text:style-name="Heading_20_3" text:outline-level="3">1. Architecture Réseau &amp; Communication</text:h>
      <text:list text:style-name="L6">
        <text:list-item>
          <text:p text:style-name="P11"><text:span text:style-name="T1">Mode local :</text:span> Fonctionnement sans internet (Wi-Fi privé orchestre).</text:p>
        </text:list-item>
        <text:list-item>
          <text:p text:style-name="P11"><text:span text:style-name="T1">Synchronisation (Tableau Noir) :</text:span> Le serveur maintient un état <text:span text:style-name="Source_20_Text">current_sync</text:span> (morceau + timestamp).</text:p>
        </text:list-item>
        <text:list-item>
          <text:p text:style-name="P11"><text:span text:style-name="T1">Communication bidirectionnelle :</text:span> * Le client qui sélectionne un morceau fait un <text:span text:style-name="Source_20_Text">sync_push</text:span>.</text:p>
          <text:list>
            <text:list-item>
              <text:p text:style-name="P11">Tous les autres clients font un <text:span text:style-name="Source_20_Text">sync_check</text:span> cyclique (3-5s).</text:p>
            </text:list-item>
          </text:list>
        </text:list-item>
      </text:list>
      <text:h text:style-name="Heading_20_3" text:outline-level="3">2. Stratégie de Rendu Hybride</text:h>
      <text:p text:style-name="Text_20_body">Le serveur détecte le client via son <text:span text:style-name="Source_20_Text">User-Agent</text:span> :</text:p>
      <text:list text:style-name="L7">
        <text:list-item>
          <text:p text:style-name="P12"><text:span text:style-name="T1">Client Obsolete (Android 4, 5, 6) :</text:span> Flux d'images <text:span text:style-name="T1">JPG</text:span> (légèreté et compatibilité RAM).</text:p>
        </text:list-item>
        <text:list-item>
          <text:p text:style-name="P12"><text:span text:style-name="T1">Client Moderne :</text:span> Flux <text:span text:style-name="T1">PDF</text:span> original (pour la netteté et les fonctions natives).</text:p>
        </text:list-item>
      </text:list>
      <text:h text:style-name="Heading_20_3" text:outline-level="3">3. Affichage &amp; Ergonomie Pupitre</text:h>
      <text:list text:style-name="L8">
        <text:list-item>
          <text:p text:style-name="P13"><text:span text:style-name="T1">Format Source :</text:span> A4 Portrait.</text:p>
        </text:list-item>
        <text:list-item>
          <text:p text:style-name="P7">Adaptation Dynamique (Portrait/Paysage) :</text:p>
          <text:list>
            <text:list-item>
              <text:p text:style-name="P13"><text:span text:style-name="T1">Portrait :</text:span> La largeur de la partition est égale à la largeur du div <text:span text:style-name="Source_20_Text">content</text:span> (scroll vertical autorisé).</text:p>
            </text:list-item>
            <text:list-item>
              <text:p text:style-name="P13"><text:span text:style-name="T1">Paysage :</text:span> La hauteur de la partition est égale à la hauteur du div <text:span text:style-name="Source_20_Text">content</text:span>.</text:p>
            </text:list-item>
            <text:list-item>
              <text:p text:style-name="P13"><text:span text:style-name="T1">Affichage Duo (Mode Moderne) :</text:span> En paysage, affichage de deux pages côte à côte.</text:p>
            </text:list-item>
          </text:list>
        </text:list-item>
        <text:list-item>
          <text:p text:style-name="P7">Navigation Invisible :</text:p>
          <text:list>
            <text:list-item>
              <text:p text:style-name="P13">Pas de boutons graphiques sur la partition.</text:p>
            </text:list-item>
            <text:list-item>
              <text:p text:style-name="P13"><text:span text:style-name="T1">Zone Gauche cliquable (50%) :</text:span> Page précédente.</text:p>
            </text:list-item>
            <text:list-item>
              <text:p text:style-name="P13"><text:span text:style-name="T1">Zone Droite cliquable (50%) :</text:span> Page suivante.</text:p>
            </text:list-item>
          </text:list>
        </text:list-item>
      </text:list>
      <text:h text:style-name="Heading_20_3" text:outline-level="3">4. Gestion de la "Pile Graphique" (Clients Obsoletes)</text:h>
      <text:list text:style-name="L9">
        <text:list-item>
          <text:p text:style-name="P14"><text:span text:style-name="T1">Chargement préventif :</text:span> Les images sont chargées une seule fois à l'ouverture du morceau.</text:p>
        </text:list-item>
        <text:list-item>
          <text:p text:style-name="P14"><text:span text:style-name="T1">Mémoire vive :</text:span> Toutes les pages d'un morceau sont présentes dans le DOM (<text:span text:style-name="Source_20_Text">position: absolute</text:span>), mais seule la page active est affichée (<text:span text:style-name="Source_20_Text">display: block</text:span>).</text:p>
        </text:list-item>
        <text:list-item>
          <text:p text:style-name="P14"><text:span text:style-name="T1">Performance :</text:span> Navigation instantanée entre les pages (zéro latence réseau lors du changement de page).</text:p>
        </text:list-item>
      </text:list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21:59:39.690301467</meta:creation-date>
    <dc:date>2026-04-26T19:17:26.276063330</dc:date>
    <meta:editing-duration>PT6M1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59" meta:word-count="697" meta:character-count="4307" meta:non-whitespace-character-count="3650"/>
  </office:meta>
</office:document-meta>
</file>